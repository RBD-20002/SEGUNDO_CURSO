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80000003FD58B6F8F.png" manifest:media-type="image/png"/>
  <manifest:file-entry manifest:full-path="Pictures/1000000000000586000007D04F6FEAE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indent="0cm" style:auto-text-indent="false" style:page-number="auto"/>
      <style:text-properties style:font-name="Agency FB1" fo:font-size="40pt" style:font-size-asian="40pt" style:font-size-complex="40pt"/>
    </style:style>
    <style:style style:name="P2" style:family="paragraph" style:parent-style-name="Heading_20_1">
      <style:paragraph-properties fo:margin-left="0cm" fo:margin-right="0cm" fo:text-indent="0cm" style:auto-text-indent="false"/>
      <style:text-properties style:font-name="Agency FB1" fo:font-size="40pt" style:font-size-asian="40pt" style:font-size-complex="40pt"/>
    </style:style>
    <style:style style:name="P3" style:family="paragraph" style:parent-style-name="Heading_20_1">
      <style:paragraph-properties fo:margin-left="0cm" fo:margin-right="0cm" fo:text-indent="0cm" style:auto-text-indent="false"/>
      <style:text-properties style:font-name="Agency FB1" fo:font-size="12pt" style:font-size-asian="9pt" style:font-size-complex="10.25pt"/>
    </style:style>
    <style:style style:name="P4" style:family="paragraph" style:parent-style-name="Text_20_body">
      <style:paragraph-properties fo:margin-left="0cm" fo:margin-right="0cm" fo:text-indent="0cm" style:auto-text-indent="false"/>
      <style:text-properties style:font-name="Agency FB1" fo:font-size="12pt" style:font-size-asian="9pt" style:font-size-complex="10.25pt"/>
    </style:style>
    <style:style style:name="P5" style:family="paragraph" style:parent-style-name="Heading">
      <style:paragraph-properties fo:text-align="end" style:justify-single-word="false"/>
      <style:text-properties fo:color="#004586" loext:opacity="100%" style:font-name="Agency FB1" fo:font-size="44pt" fo:font-weight="bold" officeooo:paragraph-rsid="000a4d02" style:font-size-asian="44pt" style:font-weight-asian="bold" style:font-size-complex="44pt" style:font-weight-complex="bold"/>
    </style:style>
    <style:style style:name="P6" style:family="paragraph" style:parent-style-name="Text_20_body">
      <style:paragraph-properties fo:margin-left="0cm" fo:margin-right="0cm" fo:text-align="start" style:justify-single-word="false" fo:text-indent="0cm" style:auto-text-indent="false"/>
      <style:text-properties style:font-name="Agency FB1" fo:font-weight="bold" officeooo:paragraph-rsid="0007244d" style:font-weight-asian="bold"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style:font-name="Agency FB1" fo:font-size="20pt" officeooo:rsid="0007244d" officeooo:paragraph-rsid="0007244d" style:font-size-asian="15pt" style:font-size-complex="17.1000003814697pt"/>
    </style:style>
    <style:style style:name="P8" style:family="paragraph" style:parent-style-name="Contents_20_Heading">
      <style:paragraph-properties fo:break-before="page"/>
      <style:text-properties fo:color="#004586" loext:opacity="100%" fo:font-size="22pt" style:font-size-asian="22pt" style:font-size-complex="22pt"/>
    </style:style>
    <style:style style:name="P9" style:family="paragraph" style:parent-style-name="Contents_20_2">
      <style:paragraph-properties>
        <style:tab-stops>
          <style:tab-stop style:position="18.5cm" style:type="right" style:leader-style="dotted" style:leader-text="."/>
        </style:tab-stops>
      </style:paragraph-properties>
    </style:style>
    <style:style style:name="P10" style:family="paragraph" style:parent-style-name="Contents_20_3">
      <style:paragraph-properties>
        <style:tab-stops>
          <style:tab-stop style:position="17.999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style:font-name="Agency FB1" fo:font-size="20pt" fo:font-weight="bold" officeooo:rsid="0007244d" officeooo:paragraph-rsid="0007244d" style:font-size-asian="20pt" style:font-weight-asian="bold" style:font-size-complex="20pt" style:font-weight-complex="bold"/>
    </style:style>
    <style:style style:name="P12" style:family="paragraph" style:parent-style-name="Heading_20_2">
      <style:paragraph-properties fo:margin-top="0cm" fo:margin-bottom="0cm" style:contextual-spacing="false" fo:line-height="100%" fo:break-before="page"/>
      <style:text-properties fo:color="#004586" loext:opacity="100%" style:font-name="Agency FB1" fo:font-size="20pt" fo:font-weight="normal" style:font-size-asian="20pt" style:font-weight-asian="normal" style:font-size-complex="20pt" style:font-weight-complex="normal"/>
    </style:style>
    <style:style style:name="P13" style:family="paragraph" style:parent-style-name="Text_20_body">
      <style:paragraph-properties fo:margin-top="0cm" fo:margin-bottom="0cm" style:contextual-spacing="false" fo:line-height="100%"/>
      <style:text-properties style:font-name="Agency FB1" fo:font-size="16pt" fo:font-weight="normal" style:font-size-asian="16pt" style:font-weight-asian="normal" style:font-size-complex="16pt" style:font-weight-complex="normal"/>
    </style:style>
    <style:style style:name="P14" style:family="paragraph" style:parent-style-name="Heading_20_2">
      <style:paragraph-properties fo:margin-top="0cm" fo:margin-bottom="0cm" style:contextual-spacing="false" fo:line-height="100%"/>
      <style:text-properties fo:color="#004586" loext:opacity="100%" style:font-name="Agency FB1" fo:font-size="16pt" fo:font-weight="normal" officeooo:paragraph-rsid="00093630" style:font-size-asian="16pt" style:font-weight-asian="normal" style:font-size-complex="16pt" style:font-weight-complex="normal"/>
    </style:style>
    <style:style style:name="P15" style:family="paragraph" style:parent-style-name="Heading_20_2" style:list-style-name="L1">
      <style:paragraph-properties fo:margin-top="0cm" fo:margin-bottom="0cm" style:contextual-spacing="false" fo:line-height="100%"/>
      <style:text-properties fo:color="#c5000b" loext:opacity="100%" style:font-name="Agency FB1" fo:font-size="18pt" fo:font-weight="bold" officeooo:paragraph-rsid="00093630" style:font-size-asian="18pt" style:font-weight-asian="bold" style:font-size-complex="18pt" style:font-weight-complex="bold"/>
    </style:style>
    <style:style style:name="P16"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paragraph-rsid="00093630" style:font-size-asian="16pt" style:font-weight-asian="bold" style:font-size-complex="16pt" style:font-weight-complex="bold"/>
    </style:style>
    <style:style style:name="P17" style:family="paragraph" style:parent-style-name="Text_20_body" style:list-style-name="L1">
      <style:paragraph-properties fo:margin-top="0cm" fo:margin-bottom="0cm" style:contextual-spacing="false" fo:line-height="100%"/>
      <style:text-properties style:font-name="Agency FB1" fo:font-size="16pt" officeooo:paragraph-rsid="000e5257" style:font-size-asian="16pt" style:font-size-complex="16pt"/>
    </style:style>
    <style:style style:name="P18" style:family="paragraph" style:parent-style-name="Text_20_body" style:list-style-name="L1">
      <style:paragraph-properties fo:margin-top="0cm" fo:margin-bottom="0cm" style:contextual-spacing="false" fo:line-height="100%"/>
      <style:text-properties fo:font-variant="normal" fo:text-transform="none" fo:color="#000000" loext:opacity="100%" style:font-name="Agency FB1" fo:font-size="16pt" fo:letter-spacing="normal" fo:font-style="normal" fo:font-weight="normal" officeooo:rsid="000e5257" officeooo:paragraph-rsid="000e5257" style:font-size-asian="16pt" style:font-weight-asian="normal" style:font-size-complex="16pt" style:font-weight-complex="normal"/>
    </style:style>
    <style:style style:name="P19" style:family="paragraph" style:parent-style-name="Heading_20_3" style:list-style-name="L1">
      <style:paragraph-properties fo:margin-top="0cm" fo:margin-bottom="0cm" style:contextual-spacing="false" fo:line-height="100%"/>
      <style:text-properties fo:color="#c5000b" loext:opacity="100%" style:font-name="Agency FB1" fo:font-size="18pt" fo:font-weight="bold" officeooo:paragraph-rsid="000b81ac" style:font-size-asian="18pt" style:font-weight-asian="bold" style:font-size-complex="18pt" style:font-weight-complex="bold"/>
    </style:style>
    <style:style style:name="P20"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paragraph-rsid="000b81ac" style:font-size-asian="16pt" style:font-weight-asian="bold" style:font-size-complex="16pt" style:font-weight-complex="bold"/>
    </style:style>
    <style:style style:name="P21" style:family="paragraph" style:parent-style-name="Text_20_body" style:list-style-name="L1">
      <style:paragraph-properties fo:margin-top="0cm" fo:margin-bottom="0cm" style:contextual-spacing="false" fo:line-height="100%"/>
      <style:text-properties style:font-name="Agency FB1" fo:font-size="16pt" fo:font-weight="normal" officeooo:rsid="000e5257" officeooo:paragraph-rsid="000e5257" style:font-size-asian="16pt" style:font-weight-asian="normal" style:font-size-complex="16pt" style:font-weight-complex="normal"/>
    </style:style>
    <style:style style:name="P22" style:family="paragraph" style:parent-style-name="Text_20_body" style:list-style-name="L1">
      <style:paragraph-properties fo:margin-top="0cm" fo:margin-bottom="0cm" style:contextual-spacing="false" fo:line-height="100%"/>
      <style:text-properties style:font-name="Agency FB1" fo:font-size="16pt" fo:font-weight="normal" officeooo:rsid="000f9880" officeooo:paragraph-rsid="000f9880" style:font-size-asian="16pt" style:font-weight-asian="normal" style:font-size-complex="16pt" style:font-weight-complex="normal"/>
    </style:style>
    <style:style style:name="P23"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paragraph-rsid="000e177f" style:font-size-asian="16pt" style:font-weight-asian="bold" style:font-size-complex="16pt" style:font-weight-complex="bold"/>
    </style:style>
    <style:style style:name="P24" style:family="paragraph" style:parent-style-name="Text_20_body" style:list-style-name="L1">
      <style:paragraph-properties fo:margin-top="0cm" fo:margin-bottom="0cm" style:contextual-spacing="false" fo:line-height="100%"/>
      <style:text-properties style:font-name="Agency FB1" fo:font-size="16pt" fo:font-weight="normal" officeooo:paragraph-rsid="000e177f" style:font-size-asian="16pt" style:font-weight-asian="normal" style:font-size-complex="16pt" style:font-weight-complex="normal"/>
    </style:style>
    <style:style style:name="P25"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style:font-size-asian="16pt" style:font-weight-asian="bold" style:font-size-complex="16pt" style:font-weight-complex="bold"/>
    </style:style>
    <style:style style:name="P26" style:family="paragraph" style:parent-style-name="Text_20_body" style:list-style-name="L1">
      <style:paragraph-properties fo:margin-top="0cm" fo:margin-bottom="0cm" style:contextual-spacing="false" fo:line-height="100%"/>
      <style:text-properties style:font-name="Agency FB1" fo:font-size="16pt" fo:font-weight="normal" style:font-size-asian="16pt" style:font-weight-asian="normal" style:font-size-complex="16pt" style:font-weight-complex="normal"/>
    </style:style>
    <style:style style:name="P27" style:family="paragraph" style:parent-style-name="Text_20_body">
      <style:paragraph-properties fo:margin-top="0cm" fo:margin-bottom="0cm" style:contextual-spacing="false" fo:line-height="100%"/>
      <style:text-properties fo:color="#000000" loext:opacity="100%" style:font-name="Agency FB1" fo:font-size="16pt" fo:font-weight="normal" style:font-size-asian="16pt" style:font-weight-asian="normal" style:font-size-complex="16pt" style:font-weight-complex="normal"/>
    </style:style>
    <style:style style:name="P28" style:family="paragraph" style:parent-style-name="Text_20_body" style:list-style-name="L1">
      <style:paragraph-properties fo:margin-top="0cm" fo:margin-bottom="0cm" style:contextual-spacing="false" fo:line-height="100%"/>
      <style:text-properties style:font-name="Agency FB1" fo:font-size="16pt" fo:font-weight="normal" officeooo:rsid="000fec44" officeooo:paragraph-rsid="000fec44" style:font-size-asian="16pt" style:font-weight-asian="normal" style:font-size-complex="16pt" style:font-weight-complex="normal"/>
    </style:style>
    <style:style style:name="P29" style:family="paragraph" style:parent-style-name="Text_20_body" style:list-style-name="L1">
      <style:paragraph-properties fo:margin-top="0cm" fo:margin-bottom="0cm" style:contextual-spacing="false" fo:line-height="100%"/>
      <style:text-properties style:font-name="Agency FB1" fo:font-size="16pt" fo:font-weight="normal" officeooo:rsid="000f24c6" officeooo:paragraph-rsid="000f24c6" style:font-size-asian="16pt" style:font-weight-asian="normal" style:font-size-complex="16pt" style:font-weight-complex="normal"/>
    </style:style>
    <style:style style:name="P30" style:family="paragraph" style:parent-style-name="Heading_20_3" style:list-style-name="L1">
      <style:paragraph-properties fo:margin-top="0cm" fo:margin-bottom="0cm" style:contextual-spacing="false" fo:line-height="100%"/>
      <style:text-properties fo:color="#c5000b" loext:opacity="100%" style:font-name="Agency FB1" fo:font-size="18pt" fo:font-weight="bold" style:font-size-asian="18pt" style:font-weight-asian="bold" style:font-size-complex="18pt" style:font-weight-complex="bold"/>
    </style:style>
    <style:style style:name="P31" style:family="paragraph" style:parent-style-name="Heading_20_5" style:list-style-name="L1">
      <style:paragraph-properties fo:line-height="100%"/>
      <style:text-properties fo:color="#579d1c" loext:opacity="100%" style:font-name="Agency FB1" fo:font-size="16pt" fo:font-weight="bold" officeooo:paragraph-rsid="000b81ac" style:font-size-asian="16pt" style:font-weight-asian="bold" style:font-size-complex="16pt" style:font-weight-complex="bold"/>
    </style:style>
    <style:style style:name="P32" style:family="paragraph" style:parent-style-name="Text_20_body" style:list-style-name="L1">
      <style:paragraph-properties fo:line-height="100%"/>
      <style:text-properties style:font-name="Agency FB1" fo:font-size="16pt" fo:font-weight="normal" officeooo:rsid="0012bbd3" officeooo:paragraph-rsid="0012bbd3" style:font-size-asian="16pt" style:font-weight-asian="normal" style:font-size-complex="16pt" style:font-weight-complex="normal"/>
    </style:style>
    <style:style style:name="P33" style:family="paragraph" style:parent-style-name="Text_20_body" style:list-style-name="L1">
      <style:paragraph-properties fo:line-height="100%"/>
      <style:text-properties fo:color="#579d1c" loext:opacity="100%" style:font-name="Agency FB1" fo:font-size="16pt" fo:font-weight="bold" style:font-size-asian="16pt" style:font-weight-asian="bold" style:font-size-complex="16pt" style:font-weight-complex="bold"/>
    </style:style>
    <style:style style:name="P34" style:family="paragraph" style:parent-style-name="Text_20_body" style:list-style-name="L1">
      <style:paragraph-properties fo:line-height="100%"/>
      <style:text-properties style:font-name="Agency FB1" fo:font-size="16pt" fo:font-weight="normal" officeooo:rsid="0013c297" officeooo:paragraph-rsid="0013c297" style:font-size-asian="16pt" style:font-weight-asian="normal" style:font-size-complex="16pt" style:font-weight-complex="normal"/>
    </style:style>
    <style:style style:name="T1" style:family="text">
      <style:text-properties fo:color="#004586" loext:opacity="100%" fo:font-size="16pt" fo:font-weight="bold" style:font-size-asian="16pt" style:font-weight-asian="bold" style:font-size-complex="16pt" style:font-weight-complex="bold"/>
    </style:style>
    <style:style style:name="T2" style:family="text">
      <style:text-properties fo:color="#004586" loext:opacity="100%" fo:font-size="16pt" fo:font-weight="bold" officeooo:rsid="000fec44"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variant="normal" fo:text-transform="none" fo:color="#000000" loext:opacity="100%" fo:letter-spacing="normal" fo:font-style="normal" fo:font-weight="normal" officeooo:rsid="000e5257" style:font-weight-asian="normal" style:font-weight-complex="normal"/>
    </style:style>
    <style:style style:name="T7" style:family="text">
      <style:text-properties fo:font-variant="normal" fo:text-transform="none" fo:color="#000000" loext:opacity="100%" fo:letter-spacing="normal" fo:font-style="normal" fo:font-weight="normal" officeooo:rsid="000f24c6" style:font-weight-asian="normal" style:font-weight-complex="normal"/>
    </style:style>
    <style:style style:name="T8" style:family="text">
      <style:text-properties fo:font-variant="normal" fo:text-transform="none" fo:color="#000000" loext:opacity="100%" fo:letter-spacing="normal" fo:font-style="normal" fo:font-weight="normal"/>
    </style:style>
    <style:style style:name="T9" style:family="text">
      <style:text-properties officeooo:rsid="000e5257"/>
    </style:style>
    <style:style style:name="T10" style:family="text">
      <style:text-properties fo:font-variant="normal" fo:text-transform="none" fo:color="#000000" loext:opacity="100%" fo:letter-spacing="normal" fo:font-style="normal"/>
    </style:style>
    <style:style style:name="T11" style:family="text">
      <style:text-properties fo:font-variant="normal" fo:text-transform="none" fo:color="#000000" loext:opacity="100%" fo:letter-spacing="normal"/>
    </style:style>
    <style:style style:name="T12" style:family="text">
      <style:text-properties fo:color="#000000" loext:opacity="100%"/>
    </style:style>
    <style:style style:name="T13" style:family="text">
      <style:text-properties fo:font-size="14pt" officeooo:rsid="000f9880" style:font-size-asian="14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2" text:anchor-type="char" svg:x="13.026cm" svg:y="-0.377cm" svg:width="6.138cm" svg:height="1.667cm" draw:z-index="1"><draw:image xlink:href="Pictures/10000001000000E80000003FD58B6F8F.png" xlink:type="simple" xlink:show="embed" xlink:actuate="onLoad" draw:mime-type="image/png"/></draw:frame></text:h>
      <text:h text:style-name="P2" text:outline-level="1"/>
      <text:h text:style-name="P2" text:outline-level="1"/>
      <text:h text:style-name="P2" text:outline-level="1"/>
      <text:h text:style-name="P3" text:outline-level="1"/>
      <text:p text:style-name="P4"/>
      <text:p text:style-name="P5"><text:bookmark-start text:name="__RefHeading___Toc195_1357662342"/>ACTIVIDAD EVALUABLE: Elabora tu currículum y entrevista personal<text:bookmark-end text:name="__RefHeading___Toc195_1357662342"/></text:p>
      <text:p text:style-name="P6"/>
      <text:p text:style-name="P7"/>
      <text:p text:style-name="P7"/>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
            <text:index-source-style text:style-name="Index_20_1"/>
            <text:index-source-style text:style-name="Index_20_2"/>
            <text:index-source-style text:style-name="User_20_Index_20_1"/>
            <text:index-source-style text:style-name="User_20_Index_20_2"/>
          </text:index-source-styles>
        </text:table-of-content-source>
        <text:index-body>
          <text:index-title text:style-name="Sect2" text:name="Sumario1_Head">
            <text:p text:style-name="P8">Sumario</text:p>
          </text:index-title>
          <text:p text:style-name="P9"><text:a xlink:type="simple" xlink:href="#__RefHeading___Toc3677_1357662342" text:style-name="Index_20_Link" text:visited-style-name="Index_20_Link"><text:span text:style-name="T1">I. ACTIVIDAD 1: Currículum Vitae<text:tab/>3</text:span></text:a></text:p>
          <text:p text:style-name="P9"><text:a xlink:type="simple" xlink:href="#__RefHeading___Toc4422_1357662342" text:style-name="Index_20_Link" text:visited-style-name="Index_20_Link"><text:span text:style-name="T1">II. ACTIVIDAD 2: Escoge 2 preguntas de entrevista de cada una de las siguientes secciones<text:tab/>4</text:span></text:a></text:p>
          <text:p text:style-name="P9"><text:span text:style-name="T1"><text:s text:c="4"/></text:span><text:a xlink:type="simple" xlink:href="#__RefHeading___Toc4424_1357662342" text:style-name="Index_20_Link" text:visited-style-name="Index_20_Link"><text:span text:style-name="T1">Sobre la Trayectoria formativa<text:tab/>4</text:span></text:a></text:p>
          <text:p text:style-name="P10"><text:a xlink:type="simple" xlink:href="#__RefHeading___Toc3683_1357662342" text:style-name="Index_20_Link" text:visited-style-name="Index_20_Link"><text:span text:style-name="T1">Preguntas sobre la experiencia profesional<text:tab/>4</text:span></text:a></text:p>
          <text:p text:style-name="P10"><text:a xlink:type="simple" xlink:href="#__RefHeading___Toc3685_1357662342" text:style-name="Index_20_Link" text:visited-style-name="Index_20_Link"><text:span text:style-name="T1">Preguntas personales<text:tab/>4</text:span></text:a></text:p>
          <text:p text:style-name="P10"><text:a xlink:type="simple" xlink:href="#__RefHeading___Toc3687_1357662342" text:style-name="Index_20_Link" text:visited-style-name="Index_20_Link"><text:span text:style-name="T1">Sobre retribuciones economicas<text:tab/>4</text:span></text:a></text:p>
          <text:p text:style-name="P10"><text:a xlink:type="simple" xlink:href="#__RefHeading___Toc3689_1357662342" text:style-name="Index_20_Link" text:visited-style-name="Index_20_Link"><text:span text:style-name="T1">Preguntas que puedes realizar al final<text:tab/></text:span></text:a><text:span text:style-name="T2">5</text:span></text:p>
        </text:index-body>
      </text:table-of-content>
      <text:p text:style-name="P11"/>
      <text:h text:style-name="P12" text:outline-level="2"><text:bookmark-start text:name="__RefHeading___Toc3677_1357662342"/><text:span text:style-name="T3">ACTIVIDAD 1:</text:span> <text:bookmark-end text:name="__RefHeading___Toc3677_1357662342"/></text:h>
      <text:p text:style-name="P13"><draw:frame draw:style-name="fr2" draw:name="Imagen1" text:anchor-type="char" svg:x="1.318cm" svg:y="0.284cm" svg:width="16.595cm" svg:height="24.993cm" draw:z-index="0"><draw:image xlink:href="Pictures/1000000000000586000007D04F6FEAE4.jpg" xlink:type="simple" xlink:show="embed" xlink:actuate="onLoad" draw:mime-type="image/jpeg"/></draw:frame></text:p>
      <text:h text:style-name="P14" text:outline-level="2"><text:bookmark-start text:name="__RefHeading___Toc4422_1357662342"/><text:soft-page-break/><text:span text:style-name="T4">ACTIVIDAD 2:</text:span><text:span text:style-name="T5"> </text:span><text:s/><text:bookmark-end text:name="__RefHeading___Toc4422_1357662342"/></text:h>
      <text:list text:style-name="L1">
        <text:list-item>
          <text:h text:style-name="P15" text:outline-level="2"><text:bookmark-start text:name="__RefHeading___Toc4424_1357662342"/>Sobre la Trayectoria formativa:<text:bookmark-end text:name="__RefHeading___Toc4424_1357662342"/></text:h>
          <text:list>
            <text:list-item>
              <text:p text:style-name="P16">¿Qué idiomas dominas y a qué nivel? </text:p>
              <text:list>
                <text:list-item>
                  <text:p text:style-name="P17"><text:span text:style-name="T6">Actualmente, mi nivel de inglés es básico, con una buena comprensión lectora que me permite entender documentación técnica o textos simples, </text:span><text:span text:style-name="T7">ademas </text:span><text:span text:style-name="T8">tengo un conocimiento pasivo del gallego; lo entiendo bien cuando lo leo o escucho. Soy muy consciente de la importancia de los idiomas en el ámbito tecnológico y tengo un gran interés en seguir mejorando mi inglés de forma activa.</text:span></text:p>
                </text:list-item>
              </text:list>
            </text:list-item>
            <text:list-item>
              <text:p text:style-name="P16">¿Quién te influyó al elegir tus estudios? </text:p>
              <text:list>
                <text:list-item>
                  <text:p text:style-name="P18">Mi elección de estudiar este FP de Informática nació de un interés personal y autodidacta por la tecnología. Desde siempre me han llamado la atención los ordenadores y la lógica detrás del código. Fue ese interés natural, que fui desarrollando por mi cuenta, el que me llevó a decidir formarme profesionalmente en este campo para poder dedicarme a lo que me gusta.</text:p>
                </text:list-item>
              </text:list>
            </text:list-item>
          </text:list>
        </text:list-item>
        <text:list-item>
          <text:h text:style-name="P19" text:outline-level="3"><text:bookmark-start text:name="__RefHeading___Toc3683_1357662342"/>Preguntas sobre la experiencia profesional<text:bookmark-end text:name="__RefHeading___Toc3683_1357662342"/></text:h>
          <text:list>
            <text:list-item>
              <text:p text:style-name="P20">¿Cómo crees que te han preparado tus experiencias profesionales previas?</text:p>
              <text:list>
                <text:list-item>
                  <text:p text:style-name="P21">Si bien no eh tenido puestos similares, durante mis diversos trabajos eh desarrollado una facilidad de poder adaptarme con facilidad y siempre comienzo con entusiasmo cuando aprendo cosas nuevas</text:p>
                </text:list-item>
              </text:list>
            </text:list-item>
            <text:list-item>
              <text:p text:style-name="P20">¿Crees que sin experiencia puedes trabajar en este puesto?</text:p>
              <text:list>
                <text:list-item>
                  <text:p text:style-name="P22">La verdad es que no tengo experiencia profesional previa como programador, pero he puesto todo mi empeño en suplir eso con un conocimiento tecnico solido y una actitud de aprendizaje constante.</text:p>
                </text:list-item>
              </text:list>
            </text:list-item>
          </text:list>
        </text:list-item>
        <text:list-item>
          <text:h text:style-name="P19" text:outline-level="3"><text:bookmark-start text:name="__RefHeading___Toc3685_1357662342"/>Preguntas personales<text:bookmark-end text:name="__RefHeading___Toc3685_1357662342"/></text:h>
          <text:list>
            <text:list-item>
              <text:p text:style-name="P23">¿Qué haces en tu tiempo libre?</text:p>
              <text:list>
                <text:list-item>
                  <text:p text:style-name="P24"><text:s/><text:span text:style-name="T9">En mi tiempo libro me gusta salir a conocer nuevos lugares con el fin de desconectar y poder relajarme, tambien practicar codificar de multiples manera con la finalidad de coger soltura y facilidad al codificar</text:span></text:p>
                </text:list-item>
              </text:list>
            </text:list-item>
            <text:list-item>
              <text:p text:style-name="P25">¿Cuáles son tus mejores cualidades?</text:p>
              <text:list>
                <text:list-item>
                  <text:p text:style-name="P26"><text:span text:style-name="T10">Considero que mis mejores cualidades son </text:span><text:span text:style-name="Strong_20_Emphasis"><text:span text:style-name="T8">mi capacidad de aprendizaje rápido</text:span></text:span><text:span text:style-name="T11"> </text:span><text:span text:style-name="T10">y </text:span><text:span text:style-name="Strong_20_Emphasis"><text:span text:style-name="T8">mi perseverancia para resolver problemas</text:span></text:span><text:span text:style-name="T10">. Como mencionaba, en mi tiempo libre practico codificación por iniciativa propia, lo que demuestra mi curiosidad y mi afán por mejorar. Además, en mis trabajos anteriores he desarrollado una gran </text:span><text:span text:style-name="Strong_20_Emphasis"><text:span text:style-name="T8">adaptabilidad</text:span></text:span><text:span text:style-name="T10">, integrándome rápidamente en diferentes equipos y entornos.</text:span><text:span text:style-name="T12"> </text:span></text:p>
                </text:list-item>
              </text:list>
            </text:list-item>
          </text:list>
        </text:list-item>
      </text:list>
      <text:p text:style-name="P27"/>
      <text:p text:style-name="P27"/>
      <text:p text:style-name="P27"/>
      <text:list text:continue-numbering="true" text:style-name="L1">
        <text:list-item>
          <text:h text:style-name="P19" text:outline-level="3"><text:bookmark-start text:name="__RefHeading___Toc3687_1357662342"/><text:soft-page-break/>Sobre retribuciones economicas<text:bookmark-end text:name="__RefHeading___Toc3687_1357662342"/></text:h>
          <text:list>
            <text:list-item>
              <text:p text:style-name="P25">¿Cuál es el mínimo para cubrir tus necesidades actuales?</text:p>
              <text:list>
                <text:list-item>
                  <text:p text:style-name="P28"><text:span text:style-name="T10">Al ser mi primera experiencia formal, valoro la oportunidad de aprender y desarrollarme profesionalmente. Mis expectativas salariales son </text:span><text:span text:style-name="Strong_20_Emphasis"><text:span text:style-name="T8">competitivas para un rol junior</text:span></text:span><text:span text:style-name="T10">, en línea con el mercado actual. </text:span><text:span text:style-name="T12"> </text:span></text:p>
                </text:list-item>
              </text:list>
            </text:list-item>
            <text:list-item>
              <text:p text:style-name="P25">¿Es el factor económico realmente el más importante en tu decisión?</text:p>
              <text:list>
                <text:list-item>
                  <text:p text:style-name="P29">Es importante, claro que si, sin embargo en este inicio de mi etapa profesional, no es el factor mas decisivo, me inclinaría mas por el lado de adquirir experiencia para crecer profesionalmente lo cual me llevara a una retribución mayor.</text:p>
                </text:list-item>
              </text:list>
            </text:list-item>
          </text:list>
        </text:list-item>
        <text:list-item>
          <text:h text:style-name="P30" text:outline-level="3"><text:bookmark-start text:name="__RefHeading___Toc3689_1357662342"/>Preguntas que puedes realizar al final <text:span text:style-name="T13">(La verdad no se como tengo que responder esto, si estas preguntas estan dirigidas como una entrevista hacia mi persona)</text:span><text:bookmark-end text:name="__RefHeading___Toc3689_1357662342"/></text:h>
          <text:list>
            <text:list-item>
              <text:h text:style-name="P31" text:outline-level="5">¿Cuáles son las funciones específicas del puesto vacante?</text:h>
              <text:list>
                <text:list-item>
                  <text:p text:style-name="P32">El puesto está orientado al desarrollo y mantenimiento de aplicaciones, con posibles tareas relacionadas con bases de datos, colaboración en el diseño de interfaces, realización de pruebas de calidad y la documentación del trabajo.</text:p>
                </text:list-item>
              </text:list>
            </text:list-item>
            <text:list-item>
              <text:p text:style-name="P33">¿Cuáles son los retos o dificultades más importantes que podría encontrar en este trabajo?</text:p>
              <text:list>
                <text:list-item>
                  <text:p text:style-name="P34">Uno de los retos iniciales será adaptarse al entorno profesional, donde los plazos son más exigentes. También supone manejar tecnologías que quizás no se han trabajado en profundidad, aprender los procesos internos de la empresa y mantener la calidad del código bajo presión. </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color="#004586" loext:opacity="100%" fo:font-weight="bold" style:font-weight-asian="bold" style:font-weight-complex="bold"/>
    </style:style>
    <style:style style:name="MP3" style:family="paragraph" style:parent-style-name="Footer">
      <style:paragraph-properties fo:text-align="end" style:justify-single-word="false"/>
      <style:text-properties fo:color="#004586" loext:opacity="100%" fo:font-weight="bold" officeooo:rsid="000b16c6" officeooo:paragraph-rsid="000b16c6" style:font-weight-asian="bold" style:font-weight-complex="bold"/>
    </style:style>
    <style:style style:name="MT1" style:family="text">
      <style:text-properties officeooo:rsid="000b81ac"/>
    </style:style>
    <style:page-layout style:name="Mpm1" style:page-usage="mirrored">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solid #000000"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Itinerario Personal para a Empregabilidade Il </text:p>
        <text:p text:style-name="MP3">Ricardo A. Bautis<text:span text:style-name="MT1">ta Díaz</text:span></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0T12:20:16.131579900</meta:creation-date>
    <dc:date>2025-09-25T00:44:36.223096500</dc:date>
    <meta:editing-duration>PT34M11S</meta:editing-duration>
    <meta:editing-cycles>5</meta:editing-cycles>
    <meta:generator>LibreOffice/25.2.5.2$Windows_X86_64 LibreOffice_project/03d19516eb2e1dd5d4ccd751a0d6f35f35e08022</meta:generator>
    <meta:print-date>2025-09-25T00:44:55.746624600</meta:print-date>
    <meta:printed-by>Archivos PDF</meta:printed-by>
    <meta:document-statistic meta:table-count="0" meta:image-count="2" meta:object-count="0" meta:page-count="5" meta:paragraph-count="40" meta:word-count="645" meta:character-count="4002" meta:non-whitespace-character-count="3409"/>
  </office:meta>
</office:document-meta>
</file>
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  <manifest:file-entry manifest:full-path="Pictures/1000000000000671000001ECFB520B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5" style:family="paragraph" style:parent-style-name="Heading_20_1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88cba" style:font-size-asian="44pt" style:font-weight-asian="bold" style:font-size-complex="44pt" style:font-weight-complex="bold"/>
    </style:style>
    <style:style style:name="P6" style:family="paragraph" style:parent-style-name="Heading_20_1">
      <style:paragraph-properties fo:margin-top="0cm" fo:margin-bottom="0cm" style:contextual-spacing="false" fo:text-align="end" style:justify-single-word="false"/>
      <style:text-properties fo:color="#004586" loext:opacity="100%" style:font-name="Agency FB1" fo:font-size="44pt" fo:font-weight="bold" officeooo:rsid="0015d9d3" officeooo:paragraph-rsid="00188cba" style:font-size-asian="44pt" style:font-weight-asian="bold" style:font-size-complex="44pt" style:font-weight-complex="bold"/>
    </style:style>
    <style:style style:name="P7" style:family="paragraph" style:parent-style-name="Text_20_body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5d9d3" style:font-size-asian="44pt" style:font-weight-asian="bold" style:font-size-complex="44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weight="bold" officeooo:paragraph-rsid="0007244d" style:font-weight-asian="bold" style:font-weight-complex="bold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10" style:family="paragraph" style:parent-style-name="Contents_20_Heading">
      <style:paragraph-properties fo:break-before="page"/>
      <style:text-properties fo:color="#004586" loext:opacity="100%" style:font-name="Agency FB1" fo:font-size="22pt" style:font-size-asian="22pt" style:font-size-complex="22pt"/>
    </style:style>
    <style:style style:name="P11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fo:font-weight="bold" officeooo:rsid="0007244d" officeooo:paragraph-rsid="0007244d" style:font-size-asian="20pt" style:font-weight-asian="bold" style:font-size-complex="20pt" style:font-weight-complex="bold"/>
    </style:style>
    <style:style style:name="P13" style:family="paragraph" style:parent-style-name="Heading_20_2">
      <style:paragraph-properties fo:margin-top="0cm" fo:margin-bottom="0cm" style:contextual-spacing="false" fo:line-height="100%" fo:break-before="page"/>
      <style:text-properties fo:color="#004586" loext:opacity="100%" style:font-name="Agency FB1" fo:font-size="20pt" fo:font-weight="bold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margin-left="0cm" fo:text-indent="0cm" style:auto-text-indent="false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Agency FB1" fo:font-size="16pt" fo:font-weight="bold" style:font-size-asian="16pt" style:font-weight-asian="bold" style:font-size-complex="16pt" style:font-weight-complex="bold"/>
    </style:style>
    <style:style style:name="P16" style:family="paragraph" style:parent-style-name="Heading_20_2">
      <style:paragraph-properties fo:margin-top="0cm" fo:margin-bottom="0cm" style:contextual-spacing="false" fo:line-height="100%"/>
      <style:text-properties fo:color="#004586" loext:opacity="100%" style:font-name="Agency FB1" fo:font-size="16pt" fo:font-weight="bold" officeooo:paragraph-rsid="00093630" style:font-size-asian="16pt" style:font-weight-asian="bold" style:font-size-complex="16pt" style:font-weight-complex="bold"/>
    </style:style>
    <style:style style:name="P17" style:family="paragraph" style:parent-style-name="Heading_20_2" style:list-style-name="L1">
      <style:paragraph-properties fo:margin-top="0cm" fo:margin-bottom="0cm" style:contextual-spacing="false" fo:line-height="100%"/>
      <style:text-properties style:font-name="Agency FB1" fo:font-size="16pt" fo:font-weight="normal" officeooo:rsid="0013c297" officeooo:paragraph-rsid="00093630" style:font-size-asian="16pt" style:font-weight-asian="normal" style:font-size-complex="16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Agency FB1" fo:font-size="16pt" fo:font-weight="normal" officeooo:rsid="0013c297" officeooo:paragraph-rsid="00093630" style:font-size-asian="16pt" style:font-weight-asian="normal" style:font-size-complex="16pt" style:font-weight-complex="normal"/>
    </style:style>
    <style:style style:name="T1" style:family="text">
      <style:text-properties fo:color="#004586" loext:opacity="100%" style:font-name="Agency FB1" fo:font-size="20pt" style:font-size-asian="20pt" style:font-size-complex="20pt"/>
    </style:style>
    <style:style style:name="T2" style:family="text">
      <style:text-properties officeooo:rsid="0019f65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191c9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○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/>
      <text:h text:style-name="P5" text:outline-level="1">UD 3 - ACT. 2 REVISIONES DE SEGURIDAD Y MANTENIMIENTO</text:h>
      <text:h text:style-name="P6" text:outline-level="1">DE EQUIPOS INFORMÁTICOS</text:h>
      <text:p text:style-name="P7"/>
      <text:p text:style-name="P8"/>
      <text:p text:style-name="P9"/>
      <text:p text:style-name="P9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10">Sumario</text:p>
          </text:index-title>
          <text:p text:style-name="P11"><text:a xlink:type="simple" xlink:href="#__RefHeading___Toc3677_1357662342" text:style-name="Index_20_Link" text:visited-style-name="Index_20_Link"><text:span text:style-name="T1">I. ACTIVIDAD 1:<text:tab/>3</text:span></text:a></text:p>
          <text:p text:style-name="P11"><text:a xlink:type="simple" xlink:href="#__RefHeading___Toc4422_1357662342" text:style-name="Index_20_Link" text:visited-style-name="Index_20_Link"><text:span text:style-name="T1">II. ACTIVIDAD 2:<text:tab/>3</text:span></text:a></text:p>
        </text:index-body>
      </text:table-of-content>
      <text:p text:style-name="P12"/>
      <text:h text:style-name="P13" text:outline-level="2"><text:bookmark-start text:name="__RefHeading___Toc3677_1357662342"/>ACTIVIDAD 1: <text:s/>“<text:span text:style-name="T2">Cuadro con datos”</text:span><text:bookmark-end text:name="__RefHeading___Toc3677_1357662342"/></text:h>
      <text:p text:style-name="Text_20_body"><draw:frame draw:style-name="fr2" draw:name="Imagen1" text:anchor-type="char" svg:x="0.228cm" svg:y="0.265cm" svg:width="19.001cm" svg:height="6.112cm" draw:z-index="1"><draw:image xlink:href="Pictures/1000000000000671000001ECFB520BA8.png" xlink:type="simple" xlink:show="embed" xlink:actuate="onLoad" draw:mime-type="image/png"/></draw:frame><text:tab/>▪ Prevención de Sobrecargas:</text:p>
      <text:p text:style-name="P14"><text:tab/><text:tab/>-No conectar demasiados dispositivos en una sola regleta.</text:p>
      <text:p text:style-name="P14"><text:tab/><text:tab/>-Usar regletas con protección contra sobrecarga.</text:p>
      <text:p text:style-name="P14"><text:tab/><text:tab/>-Identificar regletas sobrecargadas si están calientes al tacto o huelen a quemado.</text:p>
      <text:p text:style-name="P14"><text:tab/><text:tab/>-Revisar que los fusibles o interruptores diferenciales funcionen correctamente.</text:p>
      <text:p text:style-name="Text_20_body"><text:tab/>▪ Organización de Cables:</text:p>
      <text:p text:style-name="Text_20_body"><text:tab/><text:tab/>-Evitar cables enredados o doblados.</text:p>
      <text:p text:style-name="Text_20_body"><text:tab/><text:tab/>-Utilizar canaletas o bridas para mantener cables ordenados y alejados del suelo.</text:p>
      <text:p text:style-name="Text_20_body"><text:tab/><text:tab/>-No pasar cables por zonas de paso para evitar tropiezos y desconexiones accidentales.</text:p>
      <text:p text:style-name="Text_20_body"><text:tab/><text:tab/>-Revisar periódicamente el estado de los cables para evitar deterioro.</text:p>
      <text:p text:style-name="P15"/>
      <text:h text:style-name="P16" text:outline-level="2"><text:bookmark-start text:name="__RefHeading___Toc4422_1357662342"/><text:span text:style-name="T3">ACTIVIDAD 2: </text:span><text:s/>“<text:span text:style-name="T2">Comparación de respuestas”</text:span><text:bookmark-end text:name="__RefHeading___Toc4422_1357662342"/></text:h>
      <text:list text:style-name="L1">
        <text:list-header>
          <text:h text:style-name="P17" text:outline-level="2">▪<text:span text:style-name="T4">Compartiendo datos entre otros 3 grupos coincidimos con 3 de los puntos de la tabla como la revi</text:span><text:span text:style-name="T2">s</text:span><text:span text:style-name="T4">ión de regleta y enchufes , estado de la computadora, inspecci</text:span><text:span text:style-name="T2">ón</text:span><text:span text:style-name="T4"> del cableado de corriente ademas de toma corrientes </text:span></text:h>
        </text:list-header>
      </text:list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 fo:font-weight="bold" officeooo:rsid="0017f064" officeooo:paragraph-rsid="00188cba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Itinerario Personal para a Empregabilidade I</text:p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3:16:49.934103900</meta:creation-date>
    <meta:editing-duration>PT2M48S</meta:editing-duration>
    <meta:editing-cycles>3</meta:editing-cycles>
    <meta:generator>LibreOffice/25.2.5.2$Windows_X86_64 LibreOffice_project/03d19516eb2e1dd5d4ccd751a0d6f35f35e08022</meta:generator>
    <dc:title>Tareas</dc:title>
    <dc:date>2025-10-07T13:31:43.223154100</dc:date>
    <meta:document-statistic meta:table-count="0" meta:image-count="2" meta:object-count="0" meta:page-count="3" meta:paragraph-count="23" meta:word-count="166" meta:character-count="1095" meta:non-whitespace-character-count="932"/>
    <meta:template xlink:type="simple" xlink:actuate="onRequest" xlink:title="Tareas" xlink:href="../../../../AppData/Roaming/LibreOffice/4/user/template/Tareas.ott" meta:date="2025-10-07T13:16:49.711357700"/>
  </office:meta>
</office:document-meta>
</file>
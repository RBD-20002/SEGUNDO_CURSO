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align="start" style:justify-single-word="false" fo:orphans="2" fo:widows="2" fo:text-indent="0cm" style:auto-text-indent="false" style:page-number="auto"/>
    </style:style>
    <style:style style:name="P2" style:family="paragraph" style:parent-style-name="Heading_20_1">
      <style:paragraph-properties fo:margin-left="0cm" fo:margin-right="0cm" fo:text-align="start" style:justify-single-word="false" fo:orphans="2" fo:widows="2" fo:text-indent="0cm" style:auto-text-indent="false"/>
    </style:style>
    <style:style style:name="P3" style:family="paragraph" style:parent-style-name="Heading_20_1">
      <style:paragraph-properties fo:margin-left="0cm" fo:margin-right="0cm" fo:text-align="end" style:justify-single-word="false" fo:orphans="2" fo:widows="2" fo:text-indent="0cm" style:auto-text-indent="false"/>
      <style:text-properties fo:color="#c5000b" loext:opacity="100%" style:font-name="Agency FB1" fo:font-size="42pt" officeooo:paragraph-rsid="001d226c" style:font-size-asian="42pt" style:font-size-complex="42pt"/>
    </style:style>
    <style:style style:name="P4" style:family="paragraph" style:parent-style-name="Heading_20_1">
      <style:paragraph-properties fo:margin-left="0cm" fo:margin-right="0cm" fo:text-align="end" style:justify-single-word="false" fo:orphans="2" fo:widows="2" fo:text-indent="0cm" style:auto-text-indent="false"/>
      <style:text-properties style:font-name="Agency FB1" fo:font-size="42pt" officeooo:paragraph-rsid="001d226c" style:font-size-asian="42pt" style:font-size-complex="42pt"/>
    </style:style>
    <style:style style:name="P5" style:family="paragraph" style:parent-style-name="Text_20_body">
      <style:paragraph-properties fo:margin-left="0cm" fo:margin-right="0cm" fo:text-align="end" style:justify-single-word="false" fo:orphans="2" fo:widows="2" fo:text-indent="0cm" style:auto-text-indent="false"/>
    </style:style>
    <style:style style:name="P6" style:family="paragraph" style:parent-style-name="Contents_20_Heading">
      <style:paragraph-properties fo:break-before="page"/>
      <style:text-properties fo:color="#c5000b" loext:opacity="100%"/>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7.999cm" style:type="right" style:leader-style="dotted" style:leader-text="."/>
        </style:tab-stops>
      </style:paragraph-properties>
    </style:style>
    <style:style style:name="P9" style:family="paragraph" style:parent-style-name="Contents_20_4">
      <style:paragraph-properties>
        <style:tab-stops>
          <style:tab-stop style:position="17.5cm" style:type="right" style:leader-style="dotted" style:leader-text="."/>
        </style:tab-stops>
      </style:paragraph-properties>
    </style:style>
    <style:style style:name="P10"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style:font-weight-asian="bold" style:font-weight-complex="bold"/>
    </style:style>
    <style:style style:name="P11" style:family="paragraph" style:parent-style-name="Heading_20_1">
      <style:paragraph-properties fo:break-before="page"/>
    </style:style>
    <style:style style:name="P12" style:family="paragraph" style:parent-style-name="Text_20_body" style:list-style-name="L1">
      <style:text-properties fo:font-variant="normal" fo:text-transform="none" fo:color="#004586" loext:opacity="100%" style:font-name="Agency FB1" fo:font-size="18pt" fo:letter-spacing="normal" fo:font-style="normal" fo:font-weight="bold" officeooo:rsid="001f923e" officeooo:paragraph-rsid="001f923e" style:font-size-asian="18pt" style:font-weight-asian="bold" style:font-size-complex="18pt" style:font-weight-complex="bold"/>
    </style:style>
    <style:style style:name="P13" style:family="paragraph" style:parent-style-name="Text_20_body" style:list-style-name="L1">
      <style:text-properties fo:font-variant="normal" fo:text-transform="none" fo:color="#000000" loext:opacity="100%" style:font-name="Agency FB1" fo:font-size="18pt" fo:letter-spacing="normal" fo:font-style="normal" fo:font-weight="bold" officeooo:rsid="001ff528" officeooo:paragraph-rsid="001ff528" style:font-size-asian="18pt" style:font-weight-asian="bold" style:font-size-complex="18pt" style:font-weight-complex="bold"/>
    </style:style>
    <style:style style:name="P14" style:family="paragraph" style:parent-style-name="Text_20_body" style:list-style-name="L1">
      <style:text-properties fo:font-variant="normal" fo:text-transform="none" fo:color="#000000" loext:opacity="100%" style:font-name="Agency FB1" fo:font-size="18pt" fo:letter-spacing="normal" fo:font-style="normal" fo:font-weight="bold" officeooo:rsid="0023484e" officeooo:paragraph-rsid="0023484e" style:font-size-asian="18pt" style:font-weight-asian="bold" style:font-size-complex="18pt" style:font-weight-complex="bold"/>
    </style:style>
    <style:style style:name="P15" style:family="paragraph" style:parent-style-name="Text_20_body">
      <style:text-properties fo:font-variant="normal" fo:text-transform="none" fo:color="#000000" loext:opacity="100%" style:font-name="Agency FB1" fo:font-size="18pt" fo:letter-spacing="normal" fo:font-style="normal" fo:font-weight="bold" officeooo:rsid="001ff528" officeooo:paragraph-rsid="001ff528" style:font-size-asian="18pt" style:font-weight-asian="bold" style:font-size-complex="18pt" style:font-weight-complex="bold"/>
    </style:style>
    <style:style style:name="P16" style:family="paragraph" style:parent-style-name="Heading_20_1">
      <style:text-properties fo:color="#c5000b" loext:opacity="100%" style:font-name="Agency FB1" fo:font-size="21pt" fo:font-weight="bold" style:font-size-asian="21pt" style:font-weight-asian="bold" style:font-size-complex="21pt" style:font-weight-complex="bold"/>
    </style:style>
    <style:style style:name="P17" style:family="paragraph" style:parent-style-name="Standard" style:list-style-name="L2">
      <style:paragraph-properties fo:text-align="start" style:justify-single-word="false" fo:orphans="2" fo:widows="2"/>
      <style:text-properties fo:font-variant="normal" fo:text-transform="none" fo:color="#579d1c" loext:opacity="100%" style:font-name="Agency FB1" fo:font-size="16pt" fo:letter-spacing="normal" fo:font-style="normal" fo:font-weight="bold" officeooo:paragraph-rsid="0017c287" style:font-size-asian="16pt" style:font-weight-asian="bold" style:font-size-complex="16pt" style:font-weight-complex="bold"/>
    </style:style>
    <style:style style:name="P18" style:family="paragraph" style:parent-style-name="Standard" style:list-style-name="L2">
      <style:paragraph-properties fo:text-align="start" style:justify-single-word="false" fo:orphans="2" fo:widows="2"/>
      <style:text-properties officeooo:paragraph-rsid="0017c287"/>
    </style:style>
    <style:style style:name="P19" style:family="paragraph" style:parent-style-name="Standard">
      <style:paragraph-properties fo:text-align="start" style:justify-single-word="false" fo:orphans="2" fo:widows="2"/>
      <style:text-properties fo:color="#579d1c" loext:opacity="100%" style:font-name="Agency FB1" fo:font-size="16pt" fo:font-weight="bold" officeooo:paragraph-rsid="0017c287" style:font-size-asian="16pt" style:font-weight-asian="bold" style:font-size-complex="16pt" style:font-weight-complex="bold"/>
    </style:style>
    <style:style style:name="P20" style:family="paragraph" style:parent-style-name="Standard" style:list-style-name="L2">
      <style:paragraph-properties fo:text-align="start" style:justify-single-word="false" fo:orphans="2" fo:widows="2"/>
      <style:text-properties fo:color="#579d1c" loext:opacity="100%" style:font-name="Agency FB1" fo:font-size="14pt" fo:font-weight="bold" officeooo:paragraph-rsid="00199b2f" style:font-size-asian="14pt" style:font-weight-asian="bold" style:font-size-complex="14pt" style:font-weight-complex="bold"/>
    </style:style>
    <style:style style:name="P21" style:family="paragraph" style:parent-style-name="Heading_20_3" style:list-style-name="L3">
      <style:text-properties fo:color="#004586" loext:opacity="100%" fo:font-size="18pt" style:font-size-asian="18pt" style:font-size-complex="18pt"/>
    </style:style>
    <style:style style:name="P22" style:family="paragraph" style:parent-style-name="Heading_20_4" style:list-style-name="L4">
      <style:text-properties fo:color="#579d1c" loext:opacity="100%" style:font-name="Agency FB1" fo:font-size="16pt" fo:font-style="normal" style:font-size-asian="16pt" style:font-style-asian="normal" style:font-size-complex="16pt" style:font-style-complex="normal"/>
    </style:style>
    <style:style style:name="P23" style:family="paragraph" style:parent-style-name="Text_20_body" style:list-style-name="L4">
      <style:paragraph-properties fo:text-align="start" style:justify-single-word="false" fo:orphans="2" fo:widows="2"/>
      <style:text-properties style:font-name="Agency FB1" fo:font-style="normal" officeooo:paragraph-rsid="001c4992" style:font-style-asian="normal" style:font-style-complex="normal"/>
    </style:style>
    <style:style style:name="P24" style:family="paragraph" style:parent-style-name="Text_20_body" style:list-style-name="L4">
      <style:paragraph-properties fo:text-align="start" style:justify-single-word="false" fo:orphans="2" fo:widows="2"/>
      <style:text-properties style:font-name="Agency FB1" fo:font-size="16pt" fo:font-style="normal" fo:font-weight="normal" officeooo:rsid="00199b2f" officeooo:paragraph-rsid="001c4992" style:font-size-asian="16pt" style:font-style-asian="normal" style:font-weight-asian="normal" style:font-size-complex="16pt" style:font-style-complex="normal" style:font-weight-complex="normal"/>
    </style:style>
    <style:style style:name="P25" style:family="paragraph" style:parent-style-name="Heading_20_3" style:list-style-name="L4">
      <style:text-properties fo:color="#004586" loext:opacity="100%" fo:font-size="18pt" style:font-size-asian="18pt" style:font-size-complex="18pt"/>
    </style:style>
    <style:style style:name="P26" style:family="paragraph" style:parent-style-name="Text_20_body" style:list-style-name="L4">
      <style:paragraph-properties fo:text-align="start" style:justify-single-word="false" fo:orphans="2" fo:widows="2"/>
      <style:text-properties fo:color="#ff950e" loext:opacity="100%" style:font-name="Agency FB1" fo:font-size="16pt" fo:font-style="normal" fo:font-weight="bold" officeooo:rsid="001c4992" officeooo:paragraph-rsid="001d226c" style:font-size-asian="16pt" style:font-style-asian="normal" style:font-weight-asian="bold" style:font-size-complex="16pt" style:font-style-complex="normal" style:font-weight-complex="bold"/>
    </style:style>
    <style:style style:name="P27" style:family="paragraph" style:parent-style-name="Text_20_body" style:list-style-name="L4">
      <style:paragraph-properties fo:text-align="start" style:justify-single-word="false" fo:orphans="2" fo:widows="2"/>
      <style:text-properties style:font-name="Agency FB1" fo:font-style="normal" fo:font-weight="bold" officeooo:paragraph-rsid="001d226c" style:font-style-asian="normal" style:font-weight-asian="bold" style:font-style-complex="normal" style:font-weight-complex="bold"/>
    </style:style>
    <style:style style:name="P28" style:family="paragraph" style:parent-style-name="Text_20_body" style:list-style-name="L4">
      <style:paragraph-properties fo:text-align="start" style:justify-single-word="false" fo:orphans="2" fo:widows="2"/>
      <style:text-properties style:font-name="Agency FB1" fo:font-size="16pt" fo:font-style="normal" fo:font-weight="bold" officeooo:rsid="001c4992" officeooo:paragraph-rsid="001d226c" style:font-size-asian="16pt" style:font-style-asian="normal" style:font-weight-asian="bold" style:font-size-complex="16pt" style:font-style-complex="normal" style:font-weight-complex="bold"/>
    </style:style>
    <style:style style:name="P29" style:family="paragraph" style:parent-style-name="Heading_20_4" style:list-style-name="L4">
      <style:text-properties fo:color="#579d1c" loext:opacity="100%" fo:font-size="16pt" style:font-size-asian="16pt" style:font-size-complex="16pt"/>
    </style:style>
    <style:style style:name="P30" style:family="paragraph" style:parent-style-name="Text_20_body" style:list-style-name="L4">
      <style:paragraph-properties fo:text-align="start" style:justify-single-word="false" fo:orphans="2" fo:widows="2"/>
      <style:text-properties style:font-name="Agency FB1" fo:font-size="16pt" fo:font-style="normal" fo:font-weight="bold" officeooo:rsid="001d226c" officeooo:paragraph-rsid="001d226c" style:font-size-asian="16pt" style:font-style-asian="normal" style:font-weight-asian="bold" style:font-size-complex="16pt" style:font-style-complex="normal" style:font-weight-complex="bold"/>
    </style:style>
    <style:style style:name="T1" style:family="text">
      <style:text-properties fo:color="#c5000b" loext:opacity="100%"/>
    </style:style>
    <style:style style:name="T2" style:family="text">
      <style:text-properties fo:color="#000000" loext:opacity="100%" fo:font-style="normal" fo:font-weight="bold" style:font-weight-asian="bold" style:font-weight-complex="bold"/>
    </style:style>
    <style:style style:name="T3" style:family="text">
      <style:text-properties fo:color="#000000" loext:opacity="100%" fo:font-weight="bold" style:font-weight-asian="bold" style:font-weight-complex="bold"/>
    </style:style>
    <style:style style:name="T4" style:family="text">
      <style:text-properties fo:color="#000000" loext:opacity="100%" fo:font-weight="bold" officeooo:rsid="00218cdc" style:font-weight-asian="bold" style:font-weight-complex="bold"/>
    </style:style>
    <style:style style:name="T5" style:family="text">
      <style:text-properties fo:color="#000000" loext:opacity="100%" fo:font-weight="bold" officeooo:rsid="001ff528" style:font-weight-asian="bold" style:font-weight-complex="bold"/>
    </style:style>
    <style:style style:name="T6" style:family="text">
      <style:text-properties fo:color="#000000" loext:opacity="100%" fo:font-weight="bold" officeooo:rsid="001e0182" style:font-weight-asian="bold" style:font-weight-complex="bold"/>
    </style:style>
    <style:style style:name="T7" style:family="text">
      <style:text-properties fo:font-variant="normal" fo:text-transform="none" fo:color="#c5000b" loext:opacity="100%" style:font-name="Agency FB1" fo:font-size="21pt" fo:letter-spacing="normal" fo:font-style="normal" fo:font-weight="bold" style:font-size-asian="21pt" style:font-weight-asian="bold" style:font-size-complex="21pt" style:font-weight-complex="bold"/>
    </style:style>
    <style:style style:name="T8" style:family="text">
      <style:text-properties fo:font-variant="normal" fo:text-transform="none" fo:color="#c5000b" loext:opacity="100%" style:font-name="Agency FB1" fo:font-size="21pt" fo:letter-spacing="normal" fo:font-weight="bold" style:font-size-asian="21pt" style:font-weight-asian="bold" style:font-size-complex="21pt" style:font-weight-complex="bold"/>
    </style:style>
    <style:style style:name="T9" style:family="text">
      <style:text-properties fo:color="#c5000b" loext:opacity="100%" style:font-name="Agency FB1" fo:font-size="21pt" fo:font-weight="bold" style:font-size-asian="21pt" style:font-weight-asian="bold" style:font-size-complex="21pt" style:font-weight-complex="bold"/>
    </style:style>
    <style:style style:name="T10" style:family="text">
      <style:text-properties officeooo:rsid="00218cdc"/>
    </style:style>
    <style:style style:name="T11" style:family="text">
      <style:text-properties fo:font-variant="normal" fo:text-transform="none" fo:color="#579d1c" loext:opacity="100%" style:font-name="Agency FB1" fo:font-size="16pt" fo:letter-spacing="normal" fo:font-style="normal" fo:font-weight="bold" style:font-size-asian="16pt" style:font-weight-asian="bold" style:font-size-complex="16pt" style:font-weight-complex="bold"/>
    </style:style>
    <style:style style:name="T12" style:family="text">
      <style:text-properties fo:color="#579d1c" loext:opacity="100%" style:font-name="Agency FB1" fo:font-size="16pt" fo:font-weight="bold" style:font-size-asian="16pt" style:font-weight-asian="bold" style:font-size-complex="16pt" style:font-weight-complex="bold"/>
    </style:style>
    <style:style style:name="T13" style:family="text">
      <style:text-properties fo:font-variant="normal" fo:text-transform="none" fo:letter-spacing="normal" fo:font-style="normal"/>
    </style:style>
    <style:style style:name="T14" style:family="text">
      <style:text-properties style:font-name="Agency FB1" fo:font-style="normal" style:font-style-asian="normal" style:font-style-complex="normal"/>
    </style:style>
    <style:style style:name="T15" style:family="text">
      <style:text-properties fo:font-size="16pt" fo:font-weight="normal" officeooo:rsid="001b45d3" style:font-size-asian="16pt" style:font-weight-asian="normal" style:font-size-complex="16pt" style:font-weight-complex="normal"/>
    </style:style>
    <style:style style:name="T16" style:family="text">
      <style:text-properties officeooo:rsid="001b45d3"/>
    </style:style>
    <style:style style:name="T17" style:family="text">
      <style:text-properties officeooo:rsid="001c4992"/>
    </style:style>
    <style:style style:name="T18" style:family="text">
      <style:text-properties fo:font-size="16pt" officeooo:rsid="001c4992" style:font-size-asian="16pt" style:font-size-complex="16pt"/>
    </style:style>
    <style:style style:name="T19" style:family="text">
      <style:text-properties officeooo:rsid="001d226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loext:num-list-format="%1%.%2%.%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h text:style-name="P2" text:outline-level="1"/>
      <text:h text:style-name="P3" text:outline-level="1"><text:bookmark text:name="yui_3_18_1_1_1758658853240_80"/>UD 2- ACT. 1 ACCIDENTE DE </text:h>
      <text:h text:style-name="P4" text:outline-level="1"><text:span text:style-name="T1">TRABAJO</text:span> <text:s text:c="8"/></text:h>
      <text:p text:style-name="P5"/>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6">Sumario</text:p>
          </text:index-title>
          <text:p text:style-name="P7"><text:a xlink:type="simple" xlink:href="#__RefHeading___Toc490_3977373445" text:style-name="Index_20_Link" text:visited-style-name="Index_20_Link"><text:span text:style-name="T2">Busca en internet una noticia sobre un accidente laboral, </text:span><text:span text:style-name="T3"> indica el factor/es de riesgo </text:span><text:span text:style-name="T2">que detectes que han tenido relación en el suceso:</text:span><text:span text:style-name="T3"><text:tab/>3</text:span></text:a></text:p>
          <text:p text:style-name="P7"><text:a xlink:type="simple" xlink:href="#__RefHeading___Toc492_3977373445" text:style-name="Index_20_Link" text:visited-style-name="Index_20_Link"><text:span text:style-name="T3">Lee los dos siguientes casos:<text:tab/></text:span></text:a><text:span text:style-name="T4">4</text:span></text:p>
          <text:p text:style-name="P8"><text:a xlink:type="simple" xlink:href="#__RefHeading___Toc494_3977373445" text:style-name="Index_20_Link" text:visited-style-name="Index_20_Link"><text:span text:style-name="T3">Identifica qué tipo de imprudencia se comete en cada caso (profesional o temeraria) y fundamenta:<text:tab/></text:span></text:a><text:span text:style-name="T5">4</text:span></text:p>
          <text:p text:style-name="P9"><text:a xlink:type="simple" xlink:href="#__RefHeading___Toc496_3977373445" text:style-name="Index_20_Link" text:visited-style-name="Index_20_Link"><text:span text:style-name="T3">CASO |A|:<text:tab/></text:span></text:a><text:span text:style-name="T5">4</text:span></text:p>
          <text:p text:style-name="P9"><text:a xlink:type="simple" xlink:href="#__RefHeading___Toc498_3977373445" text:style-name="Index_20_Link" text:visited-style-name="Index_20_Link"><text:span text:style-name="T3">CASO |B|:<text:tab/></text:span></text:a><text:span text:style-name="T5">4</text:span></text:p>
          <text:p text:style-name="P8"><text:a xlink:type="simple" xlink:href="#__RefHeading___Toc500_3977373445" text:style-name="Index_20_Link" text:visited-style-name="Index_20_Link"><text:span text:style-name="T3">Propón dos medidas preventivas que podrían haberse aplicado para evitar cada accidente.:<text:tab/></text:span></text:a><text:span text:style-name="T6">4</text:span></text:p>
          <text:p text:style-name="P9"><text:a xlink:type="simple" xlink:href="#__RefHeading___Toc502_3977373445" text:style-name="Index_20_Link" text:visited-style-name="Index_20_Link"><text:span text:style-name="T3">CASO |A|:<text:tab/></text:span></text:a><text:span text:style-name="T4">5</text:span></text:p>
          <text:p text:style-name="P9"><text:a xlink:type="simple" xlink:href="#__RefHeading___Toc504_3977373445" text:style-name="Index_20_Link" text:visited-style-name="Index_20_Link"><text:span text:style-name="T3">CASO |B|:<text:tab/></text:span></text:a><text:span text:style-name="T4">5</text:span></text:p>
        </text:index-body>
      </text:table-of-content>
      <text:p text:style-name="P10"/>
      <text:h text:style-name="P11" text:outline-level="1"><text:bookmark-start text:name="__RefHeading___Toc490_3977373445"/><text:span text:style-name="T7">Busca en internet una </text:span><text:span text:style-name="Strong_20_Emphasis"><text:span text:style-name="T7">noticia sobre un accidente laboral</text:span></text:span><text:span text:style-name="T7">, </text:span><text:span text:style-name="T8"> </text:span><text:span text:style-name="Strong_20_Emphasis"><text:span text:style-name="T9">indica el factor/es de riesgo</text:span></text:span><text:span text:style-name="T8"> </text:span><text:span text:style-name="T7">que detectes que han tenido relación en el suceso:</text:span><text:bookmark-end text:name="__RefHeading___Toc490_3977373445"/></text:h>
      <text:list text:style-name="L1">
        <text:list-item>
          <text:p text:style-name="P12">RESUMEN:</text:p>
          <text:list>
            <text:list-item>
              <text:p text:style-name="P13">Artemio, técnico de 39 años que pertenecía a una empresa de telecomunicaciones, sufrió grave accidente al caer desde una escalera extensible mientras cortaba un cable en un poste de madera, se accidento de por una caída de 4m lo cual le provoco fracturas y secuelas permanentes. El accidente ocurrió a causa por motivo que la madera estaba podrido y cedió al cortar el cable, lo cual llevo a que golpeara la escalera, <text:span text:style-name="T10">no hubo un informe de estado del poste para realizar la labor y Artemio no contaba con el equipo de seguridad. El gerente que lo empujo a hacer la labor fue condenado por un delito contra los derechos de los trabajadores y la empresa indemnizo al trabajador.</text:span></text:p>
            </text:list-item>
            <text:list-item>
              <text:p text:style-name="P14">ENLACE: <text:a xlink:type="simple" xlink:href="https://www.juntadeandalucia.es/sites/default/files/inline-files/2024/03/PHE_0085_2024.pdf" text:style-name="Internet_20_link" text:visited-style-name="Visited_20_Internet_20_Link">CAIDA ESCALERA EXTENSIBLE</text:a> </text:p>
            </text:list-item>
          </text:list>
        </text:list-item>
        <text:list-item>
          <text:p text:style-name="P12">FACTORES DE RIESGO:</text:p>
          <text:list>
            <text:list-item>
              <text:p text:style-name="P13">Condiciones de seguridad:</text:p>
              <text:list>
                <text:list-item>
                  <text:p text:style-name="P13">Uso inadecuado de equipos de trabajo y falta de buen implementos EPI</text:p>
                </text:list-item>
                <text:list-item>
                  <text:p text:style-name="P13">Estado inadecuado de la infraestructura donde se trabajara</text:p>
                </text:list-item>
              </text:list>
            </text:list-item>
            <text:list-item>
              <text:p text:style-name="P13">Condiciones psicosociales:</text:p>
              <text:list>
                <text:list-item>
                  <text:p text:style-name="P13">Presión por parte de gerente para realizar labores no correspondientes</text:p>
                </text:list-item>
                <text:list-item>
                  <text:p text:style-name="P13">Falta de formación y comunicación </text:p>
                </text:list-item>
              </text:list>
            </text:list-item>
          </text:list>
        </text:list-item>
      </text:list>
      <text:p text:style-name="P15"/>
      <text:p text:style-name="P15"/>
      <text:p text:style-name="P15"/>
      <text:p text:style-name="P15"/>
      <text:h text:style-name="P16" text:outline-level="1"><text:bookmark text:name="yui_3_18_1_1_1758658853240_72"/><text:bookmark-start text:name="__RefHeading___Toc492_3977373445"/><text:soft-page-break/>Lee los dos siguientes casos:<text:bookmark-end text:name="__RefHeading___Toc492_3977373445"/></text:h>
      <text:section text:style-name="Sect3" text:name="Sección1">
        <text:list text:style-name="L2">
          <text:list-header>
            <text:p text:style-name="P17"/>
          </text:list-header>
          <text:list-item>
            <text:p text:style-name="P18"><text:span text:style-name="T11">Un trabajador percibe que se habían quedado restos de plásticos en el interior de la máquina y se dispone a retirarlo introduciendo su brazo (sin pararla). En ese momento la máquina se cierra, atrapándole el brazo y produciendo su amputación. En la parte frontal del equipo de trabajo hay una señal de advertencia en color rojo, que indica “peligro, no manipular la máquina sin parar”.</text:span><text:span text:style-name="T12"> </text:span></text:p>
          </text:list-item>
        </text:list>
        <text:p text:style-name="P19"/>
        <text:p text:style-name="P19"><text:bookmark text:name="__RefHeading___Toc494_3977373445 Copia 1"/></text:p>
        <text:p text:style-name="P19"/>
        <text:list text:continue-numbering="true" text:style-name="L2">
          <text:list-item>
            <text:p text:style-name="P20"><text:span text:style-name="T13"> A otro trabajador de la construcción se le había advertido que no utilizara el hueco del andamio para descender. Ya se le había hecho esta advertencia por el encargado, desoyéndola el trabajador con expresiones como “a mí me tienes que decir nada”, o que no era necesario “amarrarse”. Al trabajador se le cayó una paleta mientras trabajaba la cuarta planta. El responsable de seguridad le dijo que no hacía falta que bajara, que ya se la subía él. El trabajador hizo caso omiso, bajó por el andamio sin utilizar la escalera y sin estar sujeto por un arnés, momento en el que se precipitó.</text:span> </text:p>
          </text:list-item>
        </text:list>
      </text:section>
      <text:list text:style-name="L3">
        <text:list-item>
          <text:h text:style-name="P21" text:outline-level="3"><text:bookmark text:name="yui_3_18_1_1_1758658853240_75"/><text:bookmark text:name="yui_3_18_1_1_1758658853240_77"/><text:bookmark text:name="yui_3_18_1_1_1758658853240_76"/><text:bookmark-start text:name="__RefHeading___Toc494_3977373445"/><text:span text:style-name="T14">Identifica qué tipo de imprudencia se comete en cada caso (profesional o temeraria) y fundamenta:</text:span><text:bookmark-end text:name="__RefHeading___Toc494_3977373445"/></text:h>
        </text:list-item>
      </text:list>
      <text:list text:style-name="L4">
        <text:list-item>
          <text:list>
            <text:list-item>
              <text:h text:style-name="P22" text:outline-level="4"><text:bookmark-start text:name="__RefHeading___Toc496_3977373445"/>CASO |A|: <text:bookmark-end text:name="__RefHeading___Toc496_3977373445"/></text:h>
              <text:list>
                <text:list-item>
                  <text:p text:style-name="P23"><text:span text:style-name="T15">Se da una imprudencia “Profesional” porque el trabajador actúa de forma imprudente, porque el accionar que tuvo es incorrecta porque aun habiendo señalización y teniendo el conocimiento de como manejar este tipo de situaciones decidió ignorarlo por motivo de mal habito lo cual da como resultado un resultado desastroso para el trabajador.</text:span></text:p>
                </text:list-item>
              </text:list>
            </text:list-item>
            <text:list-item>
              <text:h text:style-name="P22" text:outline-level="4"><text:bookmark-start text:name="__RefHeading___Toc498_3977373445"/>CASO |B|: <text:bookmark-end text:name="__RefHeading___Toc498_3977373445"/></text:h>
              <text:list>
                <text:list-item>
                  <text:p text:style-name="P24"><text:span text:style-name="T16">Se da una imprudencia “Temeraria” </text:span><text:span text:style-name="T17">porque el operario en la construcción ignora los avisos de precaución del responsable de seguridad aunque se lo hayan repetido reiteradamente y dada su forma de responder ante ello, siguió con lo mismo y concluyo con un accidente mortal.</text:span></text:p>
                </text:list-item>
              </text:list>
            </text:list-item>
          </text:list>
        </text:list-item>
        <text:list-item>
          <text:h text:style-name="P25" text:outline-level="3"><text:bookmark-start text:name="__RefHeading___Toc500_3977373445"/><text:span text:style-name="T14">Propón dos medidas preventivas que podrían haberse aplicado para evitar cada accidente:</text:span><text:bookmark-end text:name="__RefHeading___Toc500_3977373445"/></text:h>
          <text:list>
            <text:list-item>
              <text:h text:style-name="P22" text:outline-level="4"><text:bookmark-start text:name="__RefHeading___Toc502_3977373445"/>CASO |A|:<text:bookmark-end text:name="__RefHeading___Toc502_3977373445"/></text:h>
              <text:list>
                <text:list-item>
                  <text:p text:style-name="P26">1º PROPUESTA: </text:p>
                  <text:list>
                    <text:list-item>
                      <text:p text:style-name="P27"><text:span text:style-name="T18">Implementar un seguro de “Dispositivo de Hombre muerto”</text:span></text:p>
                    </text:list-item>
                  </text:list>
                </text:list-item>
                <text:list-item>
                  <text:p text:style-name="P26"><text:soft-page-break/>2º PROPUESTA: </text:p>
                  <text:list>
                    <text:list-item>
                      <text:p text:style-name="P28">Inspecciones sorpresa en horaria de alta movimiento para ver si cumplen las medidas de seguridad ya sea con maquinaria o sin ella</text:p>
                    </text:list-item>
                  </text:list>
                </text:list-item>
              </text:list>
            </text:list-item>
            <text:list-item>
              <text:h text:style-name="P29" text:outline-level="4"><text:bookmark-start text:name="__RefHeading___Toc504_3977373445"/><text:span text:style-name="T14">CASO |B|:</text:span><text:bookmark-end text:name="__RefHeading___Toc504_3977373445"/></text:h>
              <text:list>
                <text:list-item>
                  <text:p text:style-name="P26">1º PROPUESTA: </text:p>
                  <text:list>
                    <text:list-item>
                      <text:p text:style-name="P28">Inspección obligatoria de los trabajadores en función de donde trabajaran tanto en altura para el uso de arnes y con los <text:span text:style-name="T19">EPI</text:span> obligatorios en construcción</text:p>
                    </text:list-item>
                  </text:list>
                </text:list-item>
                <text:list-item>
                  <text:p text:style-name="P26">2º PROPUESTA: </text:p>
                  <text:list>
                    <text:list-item>
                      <text:p text:style-name="P30">Implementar un registro de incumplimientos de los trabajadores, con medidas de castigo correspondiente para marcar un precedente ante los demás peones</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color="#c5000b" loext:opacity="100%" style:font-name="Agency FB1" fo:font-family="'Agency FB'" style:font-family-generic="swiss" style:font-pitch="variable" fo:font-size="16pt" fo:font-weight="bold" style:font-size-asian="12pt" style:font-weight-asian="bold" style:font-size-complex="13.6999998092651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245cm" fo:margin-top="0cm" fo:margin-bottom="0cm" style:contextual-spacing="false" fo:line-height="0.45cm" fo:text-align="end" style:justify-single-word="false" fo:text-indent="0cm" style:auto-text-indent="false"/>
      <style:text-properties fo:font-size="13pt" fo:font-weight="bold" officeooo:paragraph-rsid="001f923e" style:font-size-asian="13pt" style:font-weight-asian="bold" style:font-size-complex="13pt" style:font-weight-complex="bold"/>
    </style:style>
    <style:style style:name="MP3" style:family="paragraph" style:parent-style-name="Standard">
      <style:paragraph-properties fo:margin-left="0cm" fo:margin-right="0.242cm" fo:margin-top="0cm" fo:margin-bottom="0cm" style:contextual-spacing="false" fo:line-height="0.45cm" fo:text-align="end" style:justify-single-word="false" fo:text-indent="0cm" style:auto-text-indent="false"/>
      <style:text-properties fo:font-size="13pt" fo:font-weight="bold" officeooo:paragraph-rsid="001f923e" style:font-size-asian="13pt" style:font-weight-asian="bold" style:font-size-complex="13pt" style:font-weight-complex="bold"/>
    </style:style>
    <style:style style:name="MT1" style:family="text">
      <style:text-properties fo:font-size="11pt" style:font-size-asian="11pt"/>
    </style:style>
    <style:style style:name="MT2" style:family="text">
      <style:text-properties fo:color="#c4000a" loext:opacity="100%"/>
    </style:style>
    <style:style style:name="MT3" style:family="text">
      <style:text-properties fo:color="#c4000a" loext:opacity="100%" fo:letter-spacing="-0.007cm"/>
    </style:style>
    <style:style style:name="MT4" style:family="text">
      <style:text-properties fo:color="#c4000a" loext:opacity="100%" fo:letter-spacing="-0.005cm"/>
    </style:style>
    <style:style style:name="MT5" style:family="text">
      <style:text-properties fo:color="#c4000a" loext:opacity="100%" fo:letter-spacing="-0.004cm"/>
    </style:style>
    <style:style style:name="MT6" style:family="text">
      <style:text-properties fo:color="#c4000a" loext:opacity="100%" fo:letter-spacing="-0.009cm"/>
    </style:style>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ridge #000000" fo:border-right="none"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footer>
        <text:p text:style-name="MP2" loext:marker-style-name="MT1"><text:span text:style-name="MT2">Ricardo</text:span><text:span text:style-name="MT3"> </text:span><text:span text:style-name="MT2">A.</text:span><text:span text:style-name="MT3"> </text:span><text:span text:style-name="MT2">Bautista</text:span><text:span text:style-name="MT4"> </text:span><text:span text:style-name="MT3">Díaz</text:span></text:p>
        <text:p text:style-name="MP3" loext:marker-style-name="MT1"><text:span text:style-name="MT2">1º</text:span><text:span text:style-name="MT5"> </text:span><text:span text:style-name="MT6">FOL</text:span></text:p>
      </style:footer>
    </style:master-page>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22:21:11.488474200</meta:creation-date>
    <dc:date>2025-09-24T00:05:56.621248400</dc:date>
    <meta:editing-duration>PT8M14S</meta:editing-duration>
    <meta:editing-cycles>4</meta:editing-cycles>
    <meta:generator>LibreOffice/25.2.5.2$Windows_X86_64 LibreOffice_project/03d19516eb2e1dd5d4ccd751a0d6f35f35e08022</meta:generator>
    <meta:print-date>2025-09-24T00:04:42.704478700</meta:print-date>
    <meta:printed-by>Archivos PDF</meta:printed-by>
    <meta:document-statistic meta:table-count="0" meta:image-count="0" meta:object-count="0" meta:page-count="5" meta:paragraph-count="44" meta:word-count="695" meta:character-count="4054" meta:non-whitespace-character-count="3410"/>
  </office:meta>
</office:document-meta>
</file>
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80000003FD58B6F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gency FB" svg:font-family="'Agency FB'" style:font-family-generic="swiss"/>
    <style:font-face style:name="Agency FB1" svg:font-family="'Agency FB'"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master-page-name="First_20_Page">
      <style:paragraph-properties fo:margin-left="0cm" fo:margin-right="0cm" fo:text-indent="0cm" style:auto-text-indent="false" style:page-number="auto"/>
      <style:text-properties style:font-name="Agency FB1" fo:font-size="40pt" style:font-size-asian="40pt" style:font-size-complex="40pt"/>
    </style:style>
    <style:style style:name="P2" style:family="paragraph" style:parent-style-name="Heading_20_1">
      <style:paragraph-properties fo:margin-left="0cm" fo:margin-right="0cm" fo:text-indent="0cm" style:auto-text-indent="false"/>
      <style:text-properties style:font-name="Agency FB1" fo:font-size="40pt" style:font-size-asian="40pt" style:font-size-complex="40pt"/>
    </style:style>
    <style:style style:name="P3" style:family="paragraph" style:parent-style-name="Heading_20_1">
      <style:paragraph-properties fo:margin-left="0cm" fo:margin-right="0cm" fo:text-indent="0cm" style:auto-text-indent="false"/>
      <style:text-properties style:font-name="Agency FB1" fo:font-size="12pt" style:font-size-asian="9pt" style:font-size-complex="10.25pt"/>
    </style:style>
    <style:style style:name="P4" style:family="paragraph" style:parent-style-name="Heading_20_1">
      <style:paragraph-properties fo:text-align="end" style:justify-single-word="false"/>
      <style:text-properties fo:color="#004586" loext:opacity="100%" style:font-name="Agency FB1" fo:font-size="44pt" fo:font-weight="bold" officeooo:rsid="0015d9d3" officeooo:paragraph-rsid="00199e67" style:font-size-asian="44pt" style:font-weight-asian="bold" style:font-size-complex="44pt" style:font-weight-complex="bold"/>
    </style:style>
    <style:style style:name="P5" style:family="paragraph" style:parent-style-name="Text_20_body">
      <style:paragraph-properties fo:text-align="end" style:justify-single-word="false"/>
      <style:text-properties fo:color="#004586" loext:opacity="100%" style:font-name="Agency FB1" fo:font-size="44pt" fo:font-weight="bold" officeooo:rsid="0015d9d3" officeooo:paragraph-rsid="0015d9d3" style:font-size-asian="44pt" style:font-weight-asian="bold" style:font-size-complex="44pt" style:font-weight-complex="bold"/>
    </style:style>
    <style:style style:name="P6" style:family="paragraph" style:parent-style-name="Text_20_body">
      <style:paragraph-properties fo:margin-left="0cm" fo:margin-right="0cm" fo:text-align="start" style:justify-single-word="false" fo:text-indent="0cm" style:auto-text-indent="false"/>
      <style:text-properties style:font-name="Agency FB1" fo:font-weight="bold" officeooo:paragraph-rsid="0007244d" style:font-weight-asian="bold" style:font-weight-complex="bold"/>
    </style:style>
    <style:style style:name="P7" style:family="paragraph" style:parent-style-name="Text_20_body">
      <style:paragraph-properties fo:margin-left="0cm" fo:margin-right="0cm" fo:text-align="start" style:justify-single-word="false" fo:text-indent="0cm" style:auto-text-indent="false"/>
      <style:text-properties style:font-name="Agency FB1" fo:font-size="20pt" officeooo:rsid="0007244d" officeooo:paragraph-rsid="0007244d" style:font-size-asian="15pt" style:font-size-complex="17.1000003814697pt"/>
    </style:style>
    <style:style style:name="P8" style:family="paragraph" style:parent-style-name="Contents_20_Heading">
      <style:paragraph-properties fo:break-before="page"/>
      <style:text-properties fo:color="#004586" loext:opacity="100%" style:font-name="Agency FB1" fo:font-size="22pt" style:font-size-asian="22pt" style:font-size-complex="22pt"/>
    </style:style>
    <style:style style:name="P9" style:family="paragraph" style:parent-style-name="Contents_20_2">
      <style:paragraph-properties>
        <style:tab-stops>
          <style:tab-stop style:position="18.5cm" style:type="right" style:leader-style="dotted" style:leader-text="."/>
        </style:tab-stops>
      </style:paragraph-properties>
    </style:style>
    <style:style style:name="P10" style:family="paragraph" style:parent-style-name="Text_20_body">
      <style:paragraph-properties fo:margin-left="0cm" fo:margin-right="0cm" fo:text-align="start" style:justify-single-word="false" fo:text-indent="0cm" style:auto-text-indent="false"/>
      <style:text-properties style:font-name="Agency FB1" fo:font-size="18pt" fo:font-weight="bold" officeooo:rsid="0007244d" officeooo:paragraph-rsid="0007244d" style:font-size-asian="18pt" style:font-weight-asian="bold" style:font-size-complex="18pt" style:font-weight-complex="bold"/>
    </style:style>
    <style:style style:name="P11" style:family="paragraph" style:parent-style-name="Text_20_body">
      <style:paragraph-properties fo:margin-left="0cm" fo:margin-right="0cm" fo:text-align="start" style:justify-single-word="false" fo:text-indent="0cm" style:auto-text-indent="false"/>
      <style:text-properties fo:color="#004586" loext:opacity="100%" style:font-name="Agency FB1" fo:font-size="18pt" fo:font-weight="bold" officeooo:rsid="001ef1a1" officeooo:paragraph-rsid="001ef1a1" style:font-size-asian="18pt" style:font-weight-asian="bold" style:font-size-complex="18pt" style:font-weight-complex="bold"/>
    </style:style>
    <style:style style:name="P12" style:family="paragraph" style:parent-style-name="Text_20_body" style:list-style-name="L1">
      <style:paragraph-properties fo:text-align="start" style:justify-single-word="false"/>
      <style:text-properties fo:color="#004586" loext:opacity="100%" style:font-name="Agency FB1" fo:font-size="18pt" fo:font-weight="normal" officeooo:rsid="001ef1a1" officeooo:paragraph-rsid="001ef1a1" style:font-size-asian="18pt" style:font-weight-asian="normal" style:font-size-complex="18pt" style:font-weight-complex="normal"/>
    </style:style>
    <style:style style:name="P13" style:family="paragraph" style:parent-style-name="Text_20_body">
      <style:paragraph-properties fo:margin-left="0cm" fo:margin-right="0cm" fo:text-align="start" style:justify-single-word="false" fo:text-indent="0cm" style:auto-text-indent="false"/>
      <style:text-properties style:font-name="Agency FB1" fo:font-size="18pt" fo:font-weight="normal" officeooo:rsid="001ef1a1" officeooo:paragraph-rsid="001ef1a1" style:font-size-asian="18pt" style:font-weight-asian="normal" style:font-size-complex="18pt" style:font-weight-complex="normal"/>
    </style:style>
    <style:style style:name="P14" style:family="paragraph" style:parent-style-name="Text_20_body">
      <style:paragraph-properties fo:margin-left="0cm" fo:margin-right="0cm" fo:text-align="start" style:justify-single-word="false" fo:text-indent="0cm" style:auto-text-indent="false"/>
      <style:text-properties style:font-name="Agency FB1" fo:font-size="18pt" fo:font-weight="bold" officeooo:rsid="001ef1a1" officeooo:paragraph-rsid="001ef1a1" style:font-size-asian="18pt" style:font-weight-asian="bold" style:font-size-complex="18pt" style:font-weight-complex="bold"/>
    </style:style>
    <style:style style:name="P15" style:family="paragraph" style:parent-style-name="Heading_20_2">
      <style:paragraph-properties fo:text-align="start" style:justify-single-word="false" fo:break-before="page"/>
      <style:text-properties fo:color="#004586" loext:opacity="100%" fo:font-size="18pt" style:font-size-asian="18pt" style:font-size-complex="18pt"/>
    </style:style>
    <style:style style:name="P16" style:family="paragraph" style:parent-style-name="Text_20_body" style:list-style-name="L2">
      <style:text-properties fo:font-size="16pt" officeooo:rsid="00199e67" officeooo:paragraph-rsid="00199e67" style:font-size-asian="16pt" style:font-size-complex="16pt"/>
    </style:style>
    <style:style style:name="P17" style:family="paragraph" style:parent-style-name="Text_20_body" style:list-style-name="L2">
      <style:text-properties officeooo:paragraph-rsid="00199e67"/>
    </style:style>
    <style:style style:name="P18" style:family="paragraph" style:parent-style-name="Text_20_body" style:list-style-name="L2">
      <style:text-properties fo:font-size="16pt" officeooo:rsid="001e24df" officeooo:paragraph-rsid="001e24df" style:font-size-asian="16pt" style:font-size-complex="16pt"/>
    </style:style>
    <style:style style:name="P19" style:family="paragraph" style:parent-style-name="Heading_20_2">
      <style:paragraph-properties fo:text-align="start" style:justify-single-word="false"/>
      <style:text-properties fo:color="#004586" loext:opacity="100%" fo:font-size="18pt" style:font-size-asian="18pt" style:font-size-complex="18pt"/>
    </style:style>
    <style:style style:name="P20" style:family="paragraph" style:parent-style-name="Text_20_body" style:list-style-name="L3">
      <style:text-properties fo:font-size="16pt" officeooo:rsid="00199e67" officeooo:paragraph-rsid="00199e67" style:font-size-asian="16pt" style:font-size-complex="16pt"/>
    </style:style>
    <style:style style:name="P21" style:family="paragraph" style:parent-style-name="Text_20_body" style:list-style-name="L4">
      <style:text-properties fo:font-size="16pt" officeooo:rsid="001b0bdf" officeooo:paragraph-rsid="001b0bdf" style:font-size-asian="16pt" style:font-size-complex="16pt"/>
    </style:style>
    <style:style style:name="P22" style:family="paragraph" style:parent-style-name="Text_20_body" style:list-style-name="L4">
      <style:text-properties fo:font-size="16pt" officeooo:rsid="001e24df" officeooo:paragraph-rsid="001e24df" style:font-size-asian="16pt" style:font-size-complex="16pt"/>
    </style:style>
    <style:style style:name="P23" style:family="paragraph" style:parent-style-name="Text_20_body" style:list-style-name="L5">
      <style:text-properties fo:font-size="16pt" officeooo:rsid="001b0bdf" style:font-size-asian="16pt" style:font-size-complex="16pt"/>
    </style:style>
    <style:style style:name="P24" style:family="paragraph" style:parent-style-name="Text_20_body" style:list-style-name="L5">
      <style:text-properties fo:font-size="16pt" officeooo:rsid="001e8de8" officeooo:paragraph-rsid="001e8de8" style:font-size-asian="16pt" style:font-size-complex="16pt"/>
    </style:style>
    <style:style style:name="P25" style:family="paragraph" style:parent-style-name="Text_20_body" style:list-style-name="L6">
      <style:text-properties fo:font-size="16pt" officeooo:rsid="001b0bdf" officeooo:paragraph-rsid="001e24df" style:font-size-asian="16pt" style:font-size-complex="16pt"/>
    </style:style>
    <style:style style:name="P26" style:family="paragraph" style:parent-style-name="Text_20_body" style:list-style-name="L6">
      <style:text-properties officeooo:paragraph-rsid="001e24df"/>
    </style:style>
    <style:style style:name="T1" style:family="text">
      <style:text-properties fo:color="#004586" loext:opacity="100%" style:font-name="Agency FB1" fo:font-size="18pt" style:font-size-asian="18pt" style:font-size-complex="18pt"/>
    </style:style>
    <style:style style:name="T2" style:family="text">
      <style:text-properties fo:font-size="16pt" officeooo:rsid="00199e67" style:font-size-asian="16pt" style:font-size-complex="16pt"/>
    </style:style>
    <style:style style:name="T3" style:family="text">
      <style:text-properties fo:font-size="16pt" officeooo:rsid="001e24df" style:font-size-asian="16pt" style:font-size-complex="16pt"/>
    </style:style>
    <style:style style:name="T4" style:family="text">
      <style:text-properties fo:font-size="16pt" style:font-size-asian="16pt" style:font-size-complex="16pt"/>
    </style:style>
    <style:style style:name="T5" style:family="text">
      <style:text-properties officeooo:rsid="001b0bdf"/>
    </style:style>
    <style:style style:name="T6" style:family="text">
      <style:text-properties fo:font-size="16pt" officeooo:rsid="001b0bdf" style:font-size-asian="16pt" style:font-size-complex="16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Imagen2" text:anchor-type="char" svg:x="13.026cm" svg:y="-0.377cm" svg:width="6.138cm" svg:height="1.667cm" draw:z-index="0"><draw:image xlink:href="Pictures/10000001000000E80000003FD58B6F8F.png" xlink:type="simple" xlink:show="embed" xlink:actuate="onLoad" draw:mime-type="image/png"/></draw:frame></text:h>
      <text:h text:style-name="P2" text:outline-level="1"/>
      <text:h text:style-name="P2" text:outline-level="1"/>
      <text:h text:style-name="P2" text:outline-level="1"/>
      <text:h text:style-name="P3" text:outline-level="1"/>
      <text:h text:style-name="P4" text:outline-level="1"><text:bookmark-start text:name="__RefHeading___Toc449_3354059656"/>UD 3. ACT. 1 -<text:bookmark-end text:name="__RefHeading___Toc449_3354059656"/></text:h>
      <text:h text:style-name="P4" text:outline-level="1"><text:bookmark-start text:name="__RefHeading___Toc451_3354059656"/>DIMENSIONES MÍNIMAS<text:bookmark-end text:name="__RefHeading___Toc451_3354059656"/></text:h>
      <text:h text:style-name="P4" text:outline-level="1"><text:bookmark-start text:name="__RefHeading___Toc453_3354059656"/>ESPACIOS DE TRABAJO<text:bookmark-end text:name="__RefHeading___Toc453_3354059656"/></text:h>
      <text:p text:style-name="P5"><text:bookmark text:name="__RefHeading___Toc195_1357662342"/></text:p>
      <text:p text:style-name="P6"/>
      <text:p text:style-name="P7"/>
      <text:p text:style-name="P7"/>
      <text:table-of-content text:style-name="Sect1"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
            <text:index-source-style text:style-name="Index_20_1"/>
            <text:index-source-style text:style-name="Index_20_2"/>
            <text:index-source-style text:style-name="User_20_Index_20_1"/>
            <text:index-source-style text:style-name="User_20_Index_20_2"/>
          </text:index-source-styles>
        </text:table-of-content-source>
        <text:index-body>
          <text:index-title text:style-name="Sect2" text:name="Sumario1_Head">
            <text:p text:style-name="P8">Sumario:</text:p>
          </text:index-title>
          <text:p text:style-name="P9"><text:a xlink:type="simple" xlink:href="#__RefHeading___Toc455_3354059656" text:style-name="Index_20_Link" text:visited-style-name="Index_20_Link"><text:span text:style-name="T1">1. ACTIVIDAD 1:<text:tab/>3</text:span></text:a></text:p>
          <text:p text:style-name="P9"><text:a xlink:type="simple" xlink:href="#__RefHeading___Toc457_3354059656" text:style-name="Index_20_Link" text:visited-style-name="Index_20_Link"><text:span text:style-name="T1">2. ACTIVIDAD 2:<text:tab/>3</text:span></text:a></text:p>
          <text:p text:style-name="P9"><text:a xlink:type="simple" xlink:href="#__RefHeading___Toc459_3354059656" text:style-name="Index_20_Link" text:visited-style-name="Index_20_Link"><text:span text:style-name="T1">3. ACTIVIDAD 3:<text:tab/>3</text:span></text:a></text:p>
          <text:p text:style-name="P9"><text:a xlink:type="simple" xlink:href="#__RefHeading___Toc461_3354059656" text:style-name="Index_20_Link" text:visited-style-name="Index_20_Link"><text:span text:style-name="T1">4. ACTIVIDAD 4:<text:tab/>3</text:span></text:a></text:p>
          <text:p text:style-name="P9"><text:a xlink:type="simple" xlink:href="#__RefHeading___Toc1147_3354059656" text:style-name="Index_20_Link" text:visited-style-name="Index_20_Link"><text:span text:style-name="T1">5. ACTIVIDAD 5:<text:tab/>3</text:span></text:a></text:p>
        </text:index-body>
      </text:table-of-content>
      <text:p text:style-name="P10"/>
      <text:p text:style-name="P10"/>
      <text:p text:style-name="P11">INTEGRANTES:</text:p>
      <text:list text:style-name="L1">
        <text:list-item>
          <text:p text:style-name="P12">Borja Pazó Parga</text:p>
        </text:list-item>
        <text:list-item>
          <text:p text:style-name="P12">Alex Comesaña Gonzalez </text:p>
        </text:list-item>
        <text:list-item>
          <text:p text:style-name="P12">Ricardo Bautista Diaz</text:p>
        </text:list-item>
        <text:list-item>
          <text:p text:style-name="P12">Nicolas Primoy Pucheta</text:p>
        </text:list-item>
        <text:list-item>
          <text:p text:style-name="P12">Rolando Ocaña Parra</text:p>
        </text:list-item>
      </text:list>
      <text:p text:style-name="P13"/>
      <text:p text:style-name="P14"/>
      <text:h text:style-name="P15" text:outline-level="2"><text:bookmark-start text:name="__RefHeading___Toc455_3354059656"/>ACTIVIDAD 1:<text:bookmark-end text:name="__RefHeading___Toc455_3354059656"/></text:h>
      <text:list text:style-name="L2">
        <text:list-item>
          <text:p text:style-name="P16">Calcula si el salón es apto para que todos tengan su espacio de trabajo y si se cumple con la normativa:</text:p>
          <text:list>
            <text:list-item>
              <text:p text:style-name="P17"><text:span text:style-name="T2">Numero de personas: </text:span><text:span text:style-name="T3">21 personas en el salón</text:span></text:p>
            </text:list-item>
            <text:list-item>
              <text:p text:style-name="P17"><text:span text:style-name="T2">Espacio </text:span><text:span text:style-name="T3">total</text:span><text:span text:style-name="T2">: </text:span><text:span text:style-name="T3">75,79 </text:span><text:span text:style-name="T4">m² </text:span></text:p>
            </text:list-item>
            <text:list-item>
              <text:p text:style-name="P18">Elementos materiales: 25,69 <text:s/>m²</text:p>
            </text:list-item>
            <text:list-item>
              <text:p text:style-name="P18">Espacio no útil: 0 m²</text:p>
            </text:list-item>
          </text:list>
        </text:list-item>
      </text:list>
      <text:h text:style-name="P19" text:outline-level="2"><text:bookmark-start text:name="__RefHeading___Toc457_3354059656"/>ACTIVIDAD 2:<text:bookmark-end text:name="__RefHeading___Toc457_3354059656"/></text:h>
      <text:list text:style-name="L3">
        <text:list-item>
          <text:p text:style-name="P20">Compara <text:span text:style-name="T5">tus resultados con los demás grupos y indica si existieron ademas en que discreparon:</text:span></text:p>
          <text:list>
            <text:list-item>
              <text:p text:style-name="P20"/>
            </text:list-item>
          </text:list>
        </text:list-item>
      </text:list>
      <text:h text:style-name="P19" text:outline-level="2"><text:bookmark-start text:name="__RefHeading___Toc459_3354059656"/>ACTIVIDAD 3:<text:bookmark-end text:name="__RefHeading___Toc459_3354059656"/></text:h>
      <text:list text:style-name="L4">
        <text:list-item>
          <text:p text:style-name="P21">Trabajo Presencial vs TeleTrabajo:</text:p>
          <text:list>
            <text:list-item>
              <text:p text:style-name="P21">¿Crees que en teletrabajo se deben cumplir las mismas condiciones mínimas de espacio?</text:p>
              <text:list>
                <text:list-item>
                  <text:p text:style-name="P22">Si, se deberían cumplir con respecto a las dimensiones tanto en el trabajo de manera presencial y de manera distante, claro que se espera por parte de la empresa haga el cuestionario correspondiente para ver si el trabajador tiene lo mínimo para habilitar su espacio de trabajo en el hogar.</text:p>
                </text:list-item>
              </text:list>
            </text:list-item>
          </text:list>
        </text:list-item>
      </text:list>
      <text:h text:style-name="P19" text:outline-level="2"><text:bookmark-start text:name="__RefHeading___Toc461_3354059656"/>ACTIVIDAD 4:<text:bookmark-end text:name="__RefHeading___Toc461_3354059656"/></text:h>
      <text:list text:style-name="L5">
        <text:list-item>
          <text:p text:style-name="P23">Propuesta de mejora planteadas por cada grupo dependiendo de los resultados de cada uno:</text:p>
          <text:list>
            <text:list-item>
              <text:p text:style-name="P24">Por motivos de tiempo no se llego a compartir propuestas de mejora por los grupos, pero e</text:p>
            </text:list-item>
          </text:list>
        </text:list-item>
      </text:list>
      <text:h text:style-name="P19" text:outline-level="2"><text:bookmark-start text:name="__RefHeading___Toc1147_3354059656"/>ACTIVIDAD 5:<text:bookmark-end text:name="__RefHeading___Toc1147_3354059656"/></text:h>
      <text:list text:style-name="L6">
        <text:list-item>
          <text:p text:style-name="P25">Adjunta el informe de la aplicación INSST:</text:p>
          <text:list>
            <text:list-item>
              <text:p text:style-name="P26"><text:span text:style-name="T3">Se adjunta junto a la carpeta que se presento de manera “.ZIP” </text:span><text:span text:style-name="T6"><text:line-break/></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gency FB" svg:font-family="'Agency FB'" style:font-family-generic="swiss"/>
    <style:font-face style:name="Agency FB1" svg:font-family="'Agency FB'"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gency FB" fo:font-size="14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Agency FB" fo:font-size="14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gency FB" fo:font-family="'Agency FB'"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gency FB" fo:font-family="'Agency FB'" style:font-family-generic="swiss" fo:font-size="12pt"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9.001cm" style:type="right" style:leader-style="dotted" style:leader-text="."/>
        </style:tab-stops>
      </style:paragraph-properties>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9.0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color="#004586"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outline-level-style>
      <text:outline-level-style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color="#004586" loext:opacity="100%" fo:font-weight="bold" officeooo:rsid="0017f064" officeooo:paragraph-rsid="00199e67" style:font-weight-asian="bold" style:font-weight-complex="bold"/>
    </style:style>
    <style:style style:name="MP3" style:family="paragraph" style:parent-style-name="Footer">
      <style:paragraph-properties fo:text-align="end" style:justify-single-word="false"/>
      <style:text-properties fo:color="#004586" loext:opacity="100%" fo:font-weight="bold" officeooo:rsid="000b16c6" officeooo:paragraph-rsid="000b16c6" style:font-weight-asian="bold" style:font-weight-complex="bold"/>
    </style:style>
    <style:style style:name="MT1" style:family="text">
      <style:text-properties officeooo:rsid="000b81ac"/>
    </style:style>
    <style:page-layout style:name="Mpm1" style:page-usage="mirrored">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1cm" fo:margin-right="1cm" fo:border-top="none" fo:border-bottom="none" fo:border-left="1.5pt solid #000000" fo:border-right="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Itinerario Personal para a Empregabilidade I</text:p>
        <text:p text:style-name="MP3">Ricardo A. Bautis<text:span text:style-name="MT1">ta Díaz</text:span></text:p>
      </style:footer>
    </style:master-page>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3T01:31:36.863321100</meta:creation-date>
    <meta:editing-duration>PT14M57S</meta:editing-duration>
    <meta:editing-cycles>6</meta:editing-cycles>
    <meta:generator>LibreOffice/25.2.5.2$Windows_X86_64 LibreOffice_project/03d19516eb2e1dd5d4ccd751a0d6f35f35e08022</meta:generator>
    <dc:title>Tareas</dc:title>
    <dc:date>2025-10-05T03:05:57.153139400</dc:date>
    <meta:print-date>2025-10-07T11:48:08.185228100</meta:print-date>
    <meta:printed-by>Archivos PDF</meta:printed-by>
    <meta:document-statistic meta:table-count="0" meta:image-count="1" meta:object-count="0" meta:page-count="3" meta:paragraph-count="38" meta:word-count="270" meta:character-count="1430" meta:non-whitespace-character-count="1219"/>
    <meta:template xlink:type="simple" xlink:actuate="onRequest" xlink:title="Tareas" xlink:href="../../../../AppData/Roaming/LibreOffice/4/user/template/Tareas.ott" meta:date="2025-10-03T01:31:36.464245800"/>
  </office:meta>
</office:document-meta>
</file>
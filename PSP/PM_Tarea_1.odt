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100000339000000509ED993A1.png" manifest:media-type="image/png"/>
  <manifest:file-entry manifest:full-path="Pictures/100000010000052D000001D652D9D6D9.png" manifest:media-type="image/png"/>
  <manifest:file-entry manifest:full-path="Pictures/100000010000075D00000451A5F3BFEF.png" manifest:media-type="image/png"/>
  <manifest:file-entry manifest:full-path="Pictures/1000000100000536000001E8E0FEF79B.png" manifest:media-type="image/png"/>
  <manifest:file-entry manifest:full-path="Pictures/10000001000002E20000017BEC67E60D.png" manifest:media-type="image/png"/>
  <manifest:file-entry manifest:full-path="Pictures/10000001000007690000018DC6619D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5pt" officeooo:rsid="00192130" officeooo:paragraph-rsid="00192130" style:font-size-asian="11.25pt" style:font-size-complex="12.8500003814697pt"/>
    </style:style>
    <style:style style:name="P5" style:family="paragraph" style:parent-style-name="Heading">
      <style:paragraph-properties fo:text-align="end" style:justify-single-word="false"/>
      <style:text-properties fo:color="#004586" loext:opacity="100%" style:font-name="Agency FB1" fo:font-size="54pt" fo:font-weight="bold" officeooo:rsid="00192130" officeooo:paragraph-rsid="00192130" style:font-size-asian="54pt" style:font-weight-asian="bold" style:font-size-complex="54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8" style:family="paragraph" style:parent-style-name="Contents_20_Heading">
      <style:paragraph-properties fo:break-before="page"/>
      <style:text-properties fo:color="#004586" loext:opacity="100%" style:font-name="Agency FB1" fo:font-size="24pt" style:font-size-asian="24pt" style:font-size-complex="24pt"/>
    </style:style>
    <style:style style:name="P9" style:family="paragraph" style:parent-style-name="Contents_20_7">
      <style:paragraph-properties fo:margin-left="1.251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4586" loext:opacity="100%" style:font-name="Agency FB1" fo:font-size="22pt" fo:font-weight="bold" officeooo:rsid="0007244d" officeooo:paragraph-rsid="0007244d" style:font-size-asian="22pt" style:font-weight-asian="bold" style:font-size-complex="22pt" style:font-weight-complex="bold"/>
    </style:style>
    <style:style style:name="P11" style:family="paragraph" style:parent-style-name="Heading_20_7">
      <style:paragraph-properties fo:margin-top="0cm" fo:margin-bottom="0cm" style:contextual-spacing="false" fo:line-height="100%" fo:break-before="page"/>
      <style:text-properties officeooo:paragraph-rsid="00192130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/>
      <style:text-properties fo:color="#000000" loext:opacity="100%" style:font-name="Agency FB1" fo:font-size="16pt" fo:font-weight="bold" officeooo:rsid="0019708d" officeooo:paragraph-rsid="0019708d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/>
      <style:text-properties fo:color="#000000" loext:opacity="100%" style:font-name="Agency FB1" fo:font-size="14pt" fo:font-weight="bold" officeooo:rsid="0019708d" officeooo:paragraph-rsid="0019708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top="0cm" fo:margin-bottom="0cm" style:contextual-spacing="false" fo:line-height="100%">
        <style:tab-stops>
          <style:tab-stop style:position="3.159cm"/>
        </style:tab-stops>
      </style:paragraph-properties>
      <style:text-properties fo:color="#000000" loext:opacity="100%" style:font-name="Arial" fo:font-size="10pt" fo:font-style="normal" fo:font-weight="bold" officeooo:rsid="0019708d" officeooo:paragraph-rsid="0019708d" style:font-size-asian="10pt" style:font-style-asian="normal" style:font-weight-asian="bold" style:font-size-complex="6pt" style:font-weight-complex="bold"/>
    </style:style>
    <style:style style:name="P15" style:family="paragraph" style:parent-style-name="Text_20_body" style:list-style-name="L2">
      <style:paragraph-properties fo:margin-top="0cm" fo:margin-bottom="0cm" style:contextual-spacing="false" fo:line-height="100%"/>
      <style:text-properties fo:color="#000000" loext:opacity="100%" style:font-name="Agency FB1" fo:font-size="16pt" fo:font-weight="bold" officeooo:rsid="00192130" officeooo:paragraph-rsid="00192130" fo:background-color="transparent" style:font-size-asian="16pt" style:font-weight-asian="bold" style:font-size-complex="16pt" style:font-weight-complex="bold"/>
    </style:style>
    <style:style style:name="P16" style:family="paragraph" style:parent-style-name="Text_20_body" style:list-style-name="L2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2130" officeooo:paragraph-rsid="00192130" fo:background-color="transparent" style:font-size-asian="12pt" style:font-weight-asian="normal" style:font-size-complex="13.6999998092651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2130" officeooo:paragraph-rsid="00192130" fo:background-color="transparent" style:font-size-asian="12pt" style:font-weight-asian="normal" style:font-size-complex="13.6999998092651pt" style:font-weight-complex="normal"/>
    </style:style>
    <style:style style:name="P18" style:family="paragraph" style:parent-style-name="Text_20_body" style:list-style-name="L2">
      <style:paragraph-properties fo:margin-top="0cm" fo:margin-bottom="0cm" style:contextual-spacing="false" fo:line-height="100%"/>
      <style:text-properties fo:font-weight="bold" officeooo:paragraph-rsid="00192130" style:font-weight-asian="bold" style:font-weight-complex="bold"/>
    </style:style>
    <style:style style:name="P19" style:family="paragraph" style:parent-style-name="Text_20_body" style:list-style-name="L2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2130" officeooo:paragraph-rsid="00192130" fo:background-color="transparent" style:font-size-asian="16pt" style:font-weight-asian="normal" style:font-size-complex="16pt" style:font-weight-complex="normal"/>
    </style:style>
    <style:style style:name="P20" style:family="paragraph" style:parent-style-name="Heading_20_7">
      <style:paragraph-properties fo:margin-top="0cm" fo:margin-bottom="0cm" style:contextual-spacing="false" fo:line-height="100%"/>
      <style:text-properties officeooo:paragraph-rsid="00192130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  <style:text-properties fo:color="#000000" loext:opacity="100%" style:font-name="Agency FB1" fo:font-size="16pt" fo:font-weight="bold" officeooo:rsid="0019708d" officeooo:paragraph-rsid="0019708d" style:font-size-asian="16pt" style:font-weight-asian="bold" style:font-size-complex="16pt" style:font-weight-complex="bold"/>
    </style:style>
    <style:style style:name="P22" style:family="paragraph" style:parent-style-name="Text_20_body" style:list-style-name="L3">
      <style:paragraph-properties fo:margin-top="0cm" fo:margin-bottom="0cm" style:contextual-spacing="false" fo:line-height="100%"/>
      <style:text-properties fo:color="#000000" loext:opacity="100%" style:font-name="Agency FB1" fo:font-size="6pt" fo:font-weight="bold" officeooo:rsid="0019708d" officeooo:paragraph-rsid="0019708d" style:font-size-asian="4.5pt" style:font-weight-asian="bold" style:font-size-complex="5.09999990463257pt" style:font-weight-complex="bold"/>
    </style:style>
    <style:style style:name="P23" style:family="paragraph" style:parent-style-name="Standard">
      <loext:graphic-properties draw:fill="solid" draw:fill-color="#222436"/>
      <style:paragraph-properties fo:background-color="#222436" fo:padding="0cm" fo:border="none" style:shadow="none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gency FB1" fo:font-size="10pt" fo:font-weight="bold" officeooo:rsid="0019708d" officeooo:paragraph-rsid="0019708d" style:font-size-asian="7.5pt" style:font-weight-asian="bold" style:font-size-complex="8.55000019073486pt" style:font-weight-complex="bold"/>
    </style:style>
    <style:style style:name="P25" style:family="paragraph" style:parent-style-name="Text_20_body" style:list-style-name="L4">
      <style:paragraph-properties fo:margin-top="0cm" fo:margin-bottom="0cm" style:contextual-spacing="false" fo:line-height="100%"/>
      <style:text-properties fo:color="#000000" loext:opacity="100%" style:font-name="Agency FB1" fo:font-size="16pt" fo:font-weight="bold" officeooo:rsid="0019708d" officeooo:paragraph-rsid="0019708d" style:font-size-asian="16pt" style:font-weight-asian="bold" style:font-size-complex="16pt" style:font-weight-complex="bold"/>
    </style:style>
    <style:style style:name="P26" style:family="paragraph" style:parent-style-name="Text_20_body" style:list-style-name="L4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708d" officeooo:paragraph-rsid="0019708d" style:font-size-asian="16pt" style:font-weight-asian="normal" style:font-size-complex="16pt" style:font-weight-complex="normal"/>
    </style:style>
    <style:style style:name="P27" style:family="paragraph" style:parent-style-name="Heading_20_7">
      <style:paragraph-properties fo:margin-top="0cm" fo:margin-bottom="0cm" style:contextual-spacing="false" fo:line-height="100%"/>
      <style:text-properties style:font-name="Agency FB1" fo:font-size="20pt" officeooo:paragraph-rsid="001eb782" style:font-size-asian="20pt" style:font-size-complex="20pt"/>
    </style:style>
    <style:style style:name="P28" style:family="paragraph" style:parent-style-name="Text_20_body" style:list-style-name="L5">
      <style:paragraph-properties fo:margin-top="0cm" fo:margin-bottom="0cm" style:contextual-spacing="false" fo:line-height="100%"/>
      <style:text-properties fo:color="#000000" loext:opacity="100%" style:font-name="Agency FB1" fo:font-size="16pt" fo:font-weight="bold" officeooo:rsid="001eb782" officeooo:paragraph-rsid="001eb782" style:font-size-asian="16pt" style:font-weight-asian="bold" style:font-size-complex="16pt" style:font-weight-complex="bold"/>
    </style:style>
    <style:style style:name="P29" style:family="paragraph" style:parent-style-name="Standard" style:list-style-name="L5">
      <style:paragraph-properties fo:margin-top="0cm" fo:margin-bottom="0cm" style:contextual-spacing="false" fo:line-height="100%"/>
      <style:text-properties fo:color="#000000" loext:opacity="100%" style:font-name="Agency FB1" fo:font-size="16pt" fo:font-weight="bold" officeooo:rsid="001eb782" officeooo:paragraph-rsid="001eb782" style:font-size-asian="16pt" style:font-weight-asian="bold" style:font-size-complex="16pt" style:font-weight-complex="bold"/>
    </style:style>
    <style:style style:name="P30" style:family="paragraph" style:parent-style-name="Standard" style:list-style-name="L6">
      <style:paragraph-properties fo:margin-top="0cm" fo:margin-bottom="0cm" style:contextual-spacing="false" fo:line-height="100%"/>
      <style:text-properties fo:color="#000000" loext:opacity="100%" style:font-name="Agency FB1" fo:font-size="16pt" fo:font-weight="bold" officeooo:rsid="001eb782" officeooo:paragraph-rsid="001eb782" style:font-size-asian="16pt" style:font-weight-asian="bold" style:font-size-complex="16pt" style:font-weight-complex="bold"/>
    </style:style>
    <style:style style:name="T1" style:family="text">
      <style:text-properties fo:color="#004586" loext:opacity="100%" style:font-name="Agency FB1" fo:font-size="22pt" style:font-size-asian="22pt" style:font-size-complex="22pt"/>
    </style:style>
    <style:style style:name="T2" style:family="text">
      <style:text-properties fo:color="#004586" loext:opacity="100%" style:font-name="Agency FB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Agency FB1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Agency FB1" fo:font-size="14pt" fo:font-weight="bold" officeooo:rsid="0019708d" style:font-size-asian="14pt" style:font-weight-asian="bold" style:font-size-complex="14pt" style:font-weight-complex="bold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font-weight="normal" style:font-weight-asian="normal"/>
    </style:style>
    <style:style style:name="T7" style:family="text">
      <style:text-properties fo:color="#000000" loext:opacity="100%" style:font-name="Agency FB1" fo:font-size="16pt" officeooo:rsid="00192130" fo:background-color="transparent" loext:char-shading-value="0" style:font-size-asian="16pt" style:font-size-complex="16pt"/>
    </style:style>
    <style:style style:name="T8" style:family="text">
      <style:text-properties fo:color="#004586" loext:opacity="100%" style:font-name="Agency FB1" fo:font-size="20pt" fo:font-weight="bold" officeooo:rsid="00192130" style:font-size-asian="20pt" style:font-weight-asian="bold" style:font-size-complex="20pt" style:font-weight-complex="bold"/>
    </style:style>
    <style:style style:name="T9" style:family="text">
      <style:text-properties fo:color="#000000" loext:opacity="100%" style:font-name="Agency FB1" fo:font-size="14pt" fo:font-weight="bold" officeooo:rsid="00192130" style:font-size-asian="14pt" style:font-weight-asian="bold" style:font-size-complex="14pt" style:font-weight-complex="bold"/>
    </style:style>
    <style:style style:name="T10" style:family="text">
      <style:text-properties fo:color="#ff9668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aacff" loext:opacity="100%" fo:font-family="'JetBrains Mono'" style:font-family-generic="swiss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fdb8e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4c2f0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0b0ff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3c1ff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6" style:family="text">
      <style:text-properties fo:color="#7af8ca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7" style:family="text">
      <style:text-properties fo:color="#34d3fb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aacff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9" style:family="text">
      <style:text-properties fo:color="#7fdbca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20" style:family="text">
      <style:text-properties fo:color="#e4f3fa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21" style:family="text">
      <style:text-properties fo:color="#70b0ff" loext:opacity="100%" fo:font-family="'JetBrains Mono'" style:font-family-generic="swiss" fo:font-size="10pt" fo:font-style="italic" fo:font-weight="normal" style:font-size-asian="10pt" style:font-style-asian="italic" style:font-weight-asian="normal"/>
    </style:style>
    <style:style style:name="T22" style:family="text">
      <style:text-properties officeooo:rsid="001b3f36"/>
    </style:style>
    <style:style style:name="T23" style:family="text">
      <style:text-properties fo:color="#004586" loext:opacity="100%" fo:font-weight="bold" officeooo:rsid="00192130" style:font-weight-asian="bold" style:font-weight-complex="bold"/>
    </style:style>
    <style:style style:name="T24" style:family="text">
      <style:text-properties fo:color="#004586" loext:opacity="100%" fo:font-weight="bold" officeooo:rsid="001eb782" style:font-weight-asian="bold" style:font-weight-complex="bold"/>
    </style:style>
    <style:style style:name="T25" style:family="text">
      <style:text-properties style:font-name="Arial" fo:font-size="10pt" fo:font-style="italic" style:font-size-asian="10pt" style:font-style-asian="italic"/>
    </style:style>
    <style:style style:name="T26" style:family="text">
      <style:text-properties style:font-name="Arial" fo:font-size="10pt" fo:font-style="normal" style:font-size-asian="10pt" style:font-style-asian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PM_TAREA 1 / ENTREGA<text:bookmark-end text:name="__RefHeading___Toc195_1357662342"/></text:p>
      <text:p text:style-name="P6"/>
      <text:p text:style-name="P7"/>
      <text:p text:style-name="P7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9"><text:a xlink:type="simple" xlink:href="#__RefHeading___Toc2194_2018458541" text:style-name="Index_20_Link" text:visited-style-name="Index_20_Link"><text:span text:style-name="T1">I. ACTIVIDAD 1: <text:tab/>3</text:span></text:a></text:p>
          <text:p text:style-name="P9"><text:a xlink:type="simple" xlink:href="#__RefHeading___Toc2196_2018458541" text:style-name="Index_20_Link" text:visited-style-name="Index_20_Link"><text:span text:style-name="T1">II. ACTIVIDAD 2: <text:tab/>4</text:span></text:a></text:p>
          <text:p text:style-name="P9"><text:a xlink:type="simple" xlink:href="#__RefHeading___Toc2196_2018458541%20Copia%201" text:style-name="Index_20_Link" text:visited-style-name="Index_20_Link"><text:span text:style-name="T1">III. ACTIVIDAD 3:<text:tab/>5</text:span></text:a></text:p>
        </text:index-body>
      </text:table-of-content>
      <text:p text:style-name="P10"/>
      <text:h text:style-name="P11" text:outline-level="7"><text:bookmark-start text:name="__RefHeading___Toc2194_2018458541"/><text:span text:style-name="T2">ACTIVIDAD 1: </text:span><text:span text:style-name="T3">“</text:span><text:span text:style-name="T4">Código RunTime”</text:span><text:bookmark-end text:name="__RefHeading___Toc2194_2018458541"/></text:h>
      <text:list text:style-name="L1">
        <text:list-item>
          <text:p text:style-name="P12">Código:</text:p>
          <text:p text:style-name="P13"/>
          <text:p text:style-name="P14"><text:span text:style-name="T5">import </text:span><text:span text:style-name="T6">java.io.IOException</text:span><text:span text:style-name="T6">;<text:line-break/><text:line-break/></text:span><text:span text:style-name="T5">public class </text:span><text:span text:style-name="T6">EjecutarPSP2 </text:span><text:span text:style-name="T6">{<text:line-break/> <text:s text:c="3"/></text:span><text:span text:style-name="T5">public static void </text:span><text:span text:style-name="T6">main</text:span><text:span text:style-name="T6">(</text:span><text:span text:style-name="T6">String</text:span><text:span text:style-name="T6">[] </text:span><text:span text:style-name="T6">args</text:span><text:span text:style-name="T6">) </text:span><text:span text:style-name="T6">{<text:line-break/> <text:s text:c="7"/></text:span><text:span text:style-name="T5">if</text:span><text:span text:style-name="T6">(</text:span><text:span text:style-name="T6">args</text:span><text:span text:style-name="T6">.</text:span><text:span text:style-name="T6">length </text:span><text:span text:style-name="T6">== </text:span><text:span text:style-name="T6">0)</text:span><text:span text:style-name="T6">{<text:line-break/> <text:s text:c="11"/>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no hay comandos para ejecutar"</text:span><text:span text:style-name="T6">.</text:span><text:span text:style-name="T6">toUpperCase</text:span><text:span text:style-name="T6">()</text:span><text:span text:style-name="T6">)</text:span><text:span text:style-name="T6">;<text:line-break/> <text:s text:c="11"/></text:span><text:span text:style-name="T5">return</text:span><text:span text:style-name="T6">;<text:line-break/> <text:s text:c="7"/></text:span><text:span text:style-name="T6">}<text:line-break/> <text:s text:c="7"/></text:span><text:span text:style-name="T6">String </text:span><text:span text:style-name="T6">comando </text:span><text:span text:style-name="T6">= </text:span><text:span text:style-name="T6">args</text:span><text:span text:style-name="T6">[0]</text:span><text:span text:style-name="T6">;<text:line-break/><text:line-break/> <text:s text:c="7"/></text:span><text:span text:style-name="T5">try</text:span><text:span text:style-name="T6">{<text:line-break/><text:line-break/> <text:s text:c="11"/>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ejecutando"</text:span><text:span text:style-name="T6">.</text:span><text:span text:style-name="T6">toUpperCase</text:span><text:span text:style-name="T6">()</text:span><text:span text:style-name="T6">+</text:span><text:span text:style-name="T6">" "</text:span><text:span text:style-name="T6">+</text:span><text:span text:style-name="T6">comando</text:span><text:span text:style-name="T6">)</text:span><text:span text:style-name="T6">;<text:line-break/> <text:s text:c="11"/></text:span><text:span text:style-name="T6">Process </text:span><text:span text:style-name="T6">process </text:span><text:span text:style-name="T6">= </text:span><text:span text:style-name="T6">Runtime</text:span><text:span text:style-name="T6">.</text:span><text:span text:style-name="T5">getRuntime</text:span><text:span text:style-name="T6">()</text:span><text:span text:style-name="T6">.</text:span><text:span text:style-name="T6">exec</text:span><text:span text:style-name="T6">(</text:span><text:span text:style-name="T6">comando</text:span><text:span text:style-name="T6">)</text:span><text:span text:style-name="T6">;<text:line-break/> <text:s text:c="11"/></text:span><text:span text:style-name="T5">int </text:span><text:span text:style-name="T6">codigoSalida </text:span><text:span text:style-name="T6">= </text:span><text:span text:style-name="T6">process</text:span><text:span text:style-name="T6">.</text:span><text:span text:style-name="T6">waitFor</text:span><text:span text:style-name="T6">()</text:span><text:span text:style-name="T6">;<text:line-break/> <text:s text:c="11"/></text:span><text:span text:style-name="T5">if</text:span><text:span text:style-name="T6">(</text:span><text:span text:style-name="T6">codigoSalida </text:span><text:span text:style-name="T6">== </text:span><text:span text:style-name="T6">0) 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codigo de salida: "</text:span><text:span text:style-name="T6">+</text:span><text:span text:style-name="T6">0</text:span><text:span text:style-name="T6">)</text:span><text:span text:style-name="T6">;<text:line-break/> <text:s text:c="11"/></text:span><text:span text:style-name="T5">else 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codigo de salida: "</text:span><text:span text:style-name="T6">+</text:span><text:span text:style-name="T6">codigoSalida</text:span><text:span text:style-name="T6">)</text:span><text:span text:style-name="T6">;<text:line-break/><text:line-break/> <text:s text:c="7"/></text:span><text:span text:style-name="T6">}</text:span><text:span text:style-name="T5">catch </text:span><text:span text:style-name="T6">(</text:span><text:span text:style-name="T6">InterruptedException </text:span><text:span text:style-name="T6">ie</text:span><text:span text:style-name="T6">)</text:span><text:span text:style-name="T6">{<text:line-break/> <text:s text:c="11"/>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proceso interruptido "</text:span><text:span text:style-name="T6">.</text:span><text:span text:style-name="T6">toUpperCase</text:span><text:span text:style-name="T6">()</text:span><text:span text:style-name="T6">)</text:span><text:span text:style-name="T6">;<text:line-break/> <text:s text:c="11"/>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-1"</text:span><text:span text:style-name="T6">)</text:span><text:span text:style-name="T6">;<text:line-break/> <text:s text:c="11"/></text:span><text:span text:style-name="T6">System</text:span><text:span text:style-name="T6">.</text:span><text:span text:style-name="T5">exit</text:span><text:span text:style-name="T6">(</text:span><text:span text:style-name="T6">-</text:span><text:span text:style-name="T6">1)</text:span><text:span text:style-name="T6">;<text:line-break/> <text:s text:c="7"/></text:span><text:span text:style-name="T6">}</text:span><text:span text:style-name="T5">catch </text:span><text:span text:style-name="T6">(</text:span><text:span text:style-name="T6">IOException </text:span><text:span text:style-name="T6">e</text:span><text:span text:style-name="T6">)</text:span><text:span text:style-name="T6">{<text:line-break/> <text:s text:c="11"/>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error durante la ejecucion "</text:span><text:span text:style-name="T6">.</text:span><text:span text:style-name="T6">toUpperCase</text:span><text:span text:style-name="T6">()</text:span><text:span text:style-name="T6">+</text:span><text:span text:style-name="T6">"\ninformacion detallada \n"</text:span><text:span text:style-name="T6">.</text:span><text:span text:style-name="T6">toUpperCase</text:span><text:span text:style-name="T6">()</text:span><text:span text:style-name="T6">+</text:span><text:span text:style-name="T6">"-"</text:span><text:span text:style-name="T6">.</text:span><text:span text:style-name="T6">repeat</text:span><text:span text:style-name="T6">(</text:span><text:span text:style-name="T6">20</text:span><text:span text:style-name="T6">)</text:span><text:span text:style-name="T6">)</text:span><text:span text:style-name="T6">;<text:line-break/> <text:s text:c="11"/>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-2"</text:span><text:span text:style-name="T6">)</text:span><text:span text:style-name="T6">;<text:line-break/> <text:s text:c="11"/></text:span><text:span text:style-name="T6">e</text:span><text:span text:style-name="T6">.</text:span><text:span text:style-name="T6">printStackTrace</text:span><text:span text:style-name="T6">()</text:span><text:span text:style-name="T6">;<text:line-break/> <text:s text:c="11"/></text:span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"-"</text:span><text:span text:style-name="T6">.</text:span><text:span text:style-name="T6">repeat</text:span><text:span text:style-name="T6">(</text:span><text:span text:style-name="T6">20</text:span><text:span text:style-name="T6">)</text:span><text:span text:style-name="T6">)</text:span><text:span text:style-name="T6">;<text:line-break/> <text:s text:c="11"/></text:span><text:span text:style-name="T6">System</text:span><text:span text:style-name="T6">.</text:span><text:span text:style-name="T5">exit</text:span><text:span text:style-name="T6">(</text:span><text:span text:style-name="T6">-</text:span><text:span text:style-name="T6">2)</text:span><text:span text:style-name="T6">;<text:line-break/> <text:s text:c="7"/></text:span><text:span text:style-name="T6">}<text:line-break/> <text:s text:c="3"/></text:span><text:span text:style-name="T6">}<text:line-break/></text:span><text:span text:style-name="T6">}</text:span></text:p>
          <text:p text:style-name="P14"/>
        </text:list-item>
      </text:list>
      <text:list text:style-name="L2">
        <text:list-item>
          <text:p text:style-name="P15">Ejecuta un proceso sin “errores”:</text:p>
          <text:p text:style-name="P16"><draw:frame draw:style-name="fr2" draw:name="Imagen3" text:anchor-type="char" svg:x="0.183cm" svg:y="0.347cm" svg:width="18.366cm" svg:height="1.746cm" draw:z-index="1"><draw:image xlink:href="Pictures/1000000100000339000000509ED993A1.png" xlink:type="simple" xlink:show="embed" xlink:actuate="onLoad" draw:mime-type="image/png"/></draw:frame></text:p>
        </text:list-item>
        <text:list-item>
          <text:p text:style-name="P15">Ejecuta un proceso de un “programa que no existe”:</text:p>
        </text:list-item>
      </text:list>
      <text:p text:style-name="P17"><draw:frame draw:style-name="fr3" draw:name="Imagen4" text:anchor-type="char" svg:x="-0.041cm" svg:y="0.399cm" svg:width="19.018cm" svg:height="6.251cm" draw:z-index="2"><draw:image xlink:href="Pictures/100000010000052D000001D652D9D6D9.png" xlink:type="simple" xlink:show="embed" xlink:actuate="onLoad" draw:mime-type="image/png"/></draw:frame></text:p>
      <text:list text:continue-numbering="true" text:style-name="L2">
        <text:list-item>
          <text:p text:style-name="P18"><text:soft-page-break/><text:span text:style-name="T7">Ejecuta un proceso que acabara en “error”:</text:span></text:p>
          <text:p text:style-name="P19"><draw:frame draw:style-name="fr3" draw:name="Imagen5" text:anchor-type="char" svg:x="0.439cm" svg:y="0.51cm" svg:width="18.366cm" svg:height="5.636cm" draw:z-index="3"><draw:image xlink:href="Pictures/1000000100000536000001E8E0FEF79B.png" xlink:type="simple" xlink:show="embed" xlink:actuate="onLoad" draw:mime-type="image/png"/></draw:frame></text:p>
        </text:list-item>
      </text:list>
      <text:h text:style-name="P20" text:outline-level="7"><text:bookmark-start text:name="__RefHeading___Toc2196_2018458541"/><text:span text:style-name="T8">ACTIVIDAD 2: </text:span><text:span text:style-name="T9">“</text:span><text:span text:style-name="T4">Código con ‘directory()’ y ‘ProcessBuilder’“</text:span><text:bookmark-end text:name="__RefHeading___Toc2196_2018458541"/></text:h>
      <text:list text:style-name="L3">
        <text:list-item>
          <text:p text:style-name="P21">Código:</text:p>
          <text:p text:style-name="P22"/>
        </text:list-item>
      </text:list>
      <text:p text:style-name="P23" loext:marker-style-name="T10"><text:span text:style-name="T11">import </text:span><text:span text:style-name="T12">java.io.IOException</text:span><text:span text:style-name="T13">;<text:line-break/></text:span><text:span text:style-name="T11">import </text:span><text:span text:style-name="T12">java.util.Scanner</text:span><text:span text:style-name="T13">;<text:line-break/><text:line-break/></text:span><text:span text:style-name="T11">public class </text:span><text:span text:style-name="T12">EjecutarPSP2 </text:span><text:span text:style-name="T10">{<text:line-break/> <text:s text:c="3"/></text:span><text:span text:style-name="T11">public static void </text:span><text:span text:style-name="T14">main</text:span><text:span text:style-name="T10">(</text:span><text:span text:style-name="T12">String</text:span><text:span text:style-name="T10">[] </text:span><text:span text:style-name="T15">args</text:span><text:span text:style-name="T10">) </text:span><text:span text:style-name="T12">{<text:line-break/> <text:s text:c="7"/></text:span><text:span text:style-name="T11">try</text:span><text:span text:style-name="T16">{<text:line-break/> <text:s text:c="11"/></text:span><text:span text:style-name="T11">if</text:span><text:span text:style-name="T10">(</text:span><text:span text:style-name="T15">args</text:span><text:span text:style-name="T13">.</text:span><text:span text:style-name="T17">length </text:span><text:span text:style-name="T18">== </text:span><text:span text:style-name="T10">0)</text:span><text:span text:style-name="T19">{<text:line-break/> <text:s text:c="15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FALTO COMANDOS EL CUAL EJECUTAR"</text:span><text:span text:style-name="T10">)</text:span><text:span text:style-name="T13">;<text:line-break/> <text:s text:c="15"/></text:span><text:span text:style-name="T11">return</text:span><text:span text:style-name="T13">;<text:line-break/> <text:s text:c="11"/></text:span><text:span text:style-name="T19">}<text:line-break/> <text:s text:c="11"/></text:span><text:span text:style-name="T12">String </text:span><text:span text:style-name="T20">direccion </text:span><text:span text:style-name="T18">= </text:span><text:span text:style-name="T15">args</text:span><text:span text:style-name="T10">[0]</text:span><text:span text:style-name="T13">;<text:line-break/> <text:s text:c="11"/></text:span><text:span text:style-name="T12">String </text:span><text:span text:style-name="T20">comando </text:span><text:span text:style-name="T18">= </text:span><text:span text:style-name="T15">args</text:span><text:span text:style-name="T10">[1]</text:span><text:span text:style-name="T13">;<text:line-break/><text:line-break/> <text:s text:c="11"/></text:span><text:span text:style-name="T12">ProcessBuilder </text:span><text:span text:style-name="T20">pb </text:span><text:span text:style-name="T18">= </text:span><text:span text:style-name="T11">new </text:span><text:span text:style-name="T14">ProcessBuilder</text:span><text:span text:style-name="T10">(</text:span><text:span text:style-name="T16">"cmd"</text:span><text:span text:style-name="T13">, </text:span><text:span text:style-name="T16">"/c"</text:span><text:span text:style-name="T13">, </text:span><text:span text:style-name="T20">comando</text:span><text:span text:style-name="T10">)</text:span><text:span text:style-name="T13">;<text:line-break/> <text:s text:c="11"/></text:span><text:span text:style-name="T20">pb</text:span><text:span text:style-name="T13">.</text:span><text:span text:style-name="T14">directory</text:span><text:span text:style-name="T10">(</text:span><text:span text:style-name="T11">new </text:span><text:span text:style-name="T12">java.io.</text:span><text:span text:style-name="T14">File</text:span><text:span text:style-name="T12">(</text:span><text:span text:style-name="T20">direccion</text:span><text:span text:style-name="T12">)</text:span><text:span text:style-name="T10">)</text:span><text:span text:style-name="T13">;<text:line-break/><text:line-break/> <text:s text:c="11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Directorio de trabajo: " </text:span><text:span text:style-name="T18">+ </text:span><text:span text:style-name="T20">pb</text:span><text:span text:style-name="T13">.</text:span><text:span text:style-name="T14">directory</text:span><text:span text:style-name="T12">()</text:span><text:span text:style-name="T10">)</text:span><text:span text:style-name="T13">;<text:line-break/> <text:s text:c="11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Ejecutando comando: " </text:span><text:span text:style-name="T18">+ </text:span><text:span text:style-name="T20">comando</text:span><text:span text:style-name="T18">+</text:span><text:span text:style-name="T16">"\n"</text:span><text:span text:style-name="T18">+</text:span><text:span text:style-name="T16">"-"</text:span><text:span text:style-name="T13">.</text:span><text:span text:style-name="T14">repeat</text:span><text:span text:style-name="T12">(</text:span><text:span text:style-name="T10">20</text:span><text:span text:style-name="T12">)</text:span><text:span text:style-name="T10">)</text:span><text:span text:style-name="T13">;<text:line-break/><text:line-break/> <text:s text:c="11"/></text:span><text:span text:style-name="T16">Process </text:span><text:span text:style-name="T20">process </text:span><text:span text:style-name="T18">= </text:span><text:span text:style-name="T20">pb</text:span><text:span text:style-name="T13">.</text:span><text:span text:style-name="T14">start</text:span><text:span text:style-name="T10">()</text:span><text:span text:style-name="T13">;<text:line-break/> <text:s text:c="11"/></text:span><text:span text:style-name="T12">java.util.Scanner </text:span><text:span text:style-name="T20">lector </text:span><text:span text:style-name="T18">= </text:span><text:span text:style-name="T11">new </text:span><text:span text:style-name="T14">Scanner</text:span><text:span text:style-name="T10">(</text:span><text:span text:style-name="T20">process</text:span><text:span text:style-name="T13">.</text:span><text:span text:style-name="T14">getInputStream</text:span><text:span text:style-name="T12">()</text:span><text:span text:style-name="T10">)</text:span><text:span text:style-name="T13">;<text:line-break/> <text:s text:c="11"/></text:span><text:span text:style-name="T11">while </text:span><text:span text:style-name="T10">(</text:span><text:span text:style-name="T20">lector</text:span><text:span text:style-name="T13">.</text:span><text:span text:style-name="T14">hasNextLine</text:span><text:span text:style-name="T12">()</text:span><text:span text:style-name="T10">)</text:span><text:span text:style-name="T19">{<text:line-break/> <text:s text:c="15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20">lector</text:span><text:span text:style-name="T13">.</text:span><text:span text:style-name="T14">nextLine</text:span><text:span text:style-name="T12">()</text:span><text:span text:style-name="T10">)</text:span><text:span text:style-name="T13">;<text:line-break/> <text:s text:c="11"/></text:span><text:span text:style-name="T19">}<text:line-break/> <text:s text:c="11"/></text:span><text:span text:style-name="T20">lector</text:span><text:span text:style-name="T13">.</text:span><text:span text:style-name="T14">close</text:span><text:span text:style-name="T10">()</text:span><text:span text:style-name="T13">;<text:line-break/><text:line-break/> <text:s text:c="11"/></text:span><text:span text:style-name="T11">int </text:span><text:span text:style-name="T20">codigoSalida </text:span><text:span text:style-name="T18">= </text:span><text:span text:style-name="T20">process</text:span><text:span text:style-name="T13">.</text:span><text:span text:style-name="T14">waitFor</text:span><text:span text:style-name="T10">()</text:span><text:span text:style-name="T13">;<text:line-break/> <text:s text:c="11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codigo de salida: "</text:span><text:span text:style-name="T13">.</text:span><text:span text:style-name="T14">toUpperCase</text:span><text:span text:style-name="T12">()</text:span><text:span text:style-name="T18">+</text:span><text:span text:style-name="T20">codigoSalida</text:span><text:span text:style-name="T10">)</text:span><text:span text:style-name="T13">;<text:line-break/><text:line-break/> <text:s text:c="7"/></text:span><text:span text:style-name="T16">}</text:span><text:span text:style-name="T11">catch </text:span><text:span text:style-name="T10">(</text:span><text:span text:style-name="T12">IOException </text:span><text:span text:style-name="T15">e</text:span><text:span text:style-name="T10">)</text:span><text:span text:style-name="T16">{<text:line-break/> <text:s text:c="11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error durante la ejecucion "</text:span><text:span text:style-name="T13">.</text:span><text:span text:style-name="T14">toUpperCase</text:span><text:span text:style-name="T12">()</text:span><text:span text:style-name="T18">+</text:span><text:span text:style-name="T16">"\ninformacion detallado"</text:span><text:span text:style-name="T13">.</text:span><text:span text:style-name="T14">toUpperCase</text:span><text:span text:style-name="T12">()</text:span><text:span text:style-name="T10">)</text:span><text:span text:style-name="T13">;<text:line-break/> <text:s text:c="11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-"</text:span><text:span text:style-name="T13">.</text:span><text:span text:style-name="T14">repeat</text:span><text:span text:style-name="T12">(</text:span><text:span text:style-name="T10">20</text:span><text:span text:style-name="T12">)</text:span><text:span text:style-name="T10">)</text:span><text:span text:style-name="T13">;<text:line-break/> <text:s text:c="11"/></text:span><text:span text:style-name="T15">e</text:span><text:span text:style-name="T13">.</text:span><text:span text:style-name="T14">printStackTrace</text:span><text:span text:style-name="T10">()</text:span><text:span text:style-name="T13">;<text:line-break/> <text:s text:c="11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-"</text:span><text:span text:style-name="T13">.</text:span><text:span text:style-name="T14">repeat</text:span><text:span text:style-name="T12">(</text:span><text:span text:style-name="T10">20</text:span><text:span text:style-name="T12">)</text:span><text:span text:style-name="T10">)</text:span><text:span text:style-name="T13">;<text:line-break/> <text:s text:c="11"/></text:span><text:span text:style-name="T12">System</text:span><text:span text:style-name="T13">.</text:span><text:span text:style-name="T21">exit</text:span><text:span text:style-name="T10">(</text:span><text:span text:style-name="T18">-</text:span><text:span text:style-name="T10">1)</text:span><text:span text:style-name="T13">;<text:line-break/> <text:s text:c="7"/></text:span><text:span text:style-name="T16">}</text:span><text:span text:style-name="T11">catch </text:span><text:span text:style-name="T10">(</text:span><text:span text:style-name="T12">InterruptedException </text:span><text:span text:style-name="T15">ie</text:span><text:span text:style-name="T10">)</text:span><text:span text:style-name="T16">{<text:line-break/> <text:s text:c="11"/></text:span><text:span text:style-name="T12">System</text:span><text:span text:style-name="T13">.</text:span><text:span text:style-name="T17">out</text:span><text:span text:style-name="T13">.</text:span><text:span text:style-name="T14">println</text:span><text:span text:style-name="T10">(</text:span><text:span text:style-name="T16">"proceso interrumpido"</text:span><text:span text:style-name="T13">.</text:span><text:span text:style-name="T14">toUpperCase</text:span><text:span text:style-name="T12">()</text:span><text:span text:style-name="T10">)</text:span><text:span text:style-name="T13">;<text:line-break/> <text:s text:c="11"/></text:span><text:span text:style-name="T12">System</text:span><text:span text:style-name="T13">.</text:span><text:span text:style-name="T21">exit</text:span><text:span text:style-name="T10">(</text:span><text:span text:style-name="T18">-</text:span><text:span text:style-name="T10">2)</text:span><text:span text:style-name="T13">;<text:line-break/> <text:s text:c="7"/></text:span><text:span text:style-name="T16">}<text:line-break/> <text:s text:c="3"/></text:span><text:span text:style-name="T12">}<text:line-break/></text:span><text:span text:style-name="T10">}</text:span></text:p>
      <text:p text:style-name="P24"><text:soft-page-break/></text:p>
      <text:list text:style-name="L4">
        <text:list-item>
          <text:p text:style-name="P25">Ejecuta un proceso <text:span text:style-name="T22">que muestre el directorio</text:span>:</text:p>
          <text:p text:style-name="P26"><draw:frame draw:style-name="fr3" draw:name="Imagen6" text:anchor-type="char" svg:x="0.318cm" svg:y="0.42cm" svg:width="18.366cm" svg:height="9.026cm" draw:z-index="4"><draw:image xlink:href="Pictures/10000001000002E20000017BEC67E60D.png" xlink:type="simple" xlink:show="embed" xlink:actuate="onLoad" draw:mime-type="image/png"/></draw:frame></text:p>
        </text:list-item>
      </text:list>
      <text:h text:style-name="P27" text:outline-level="7"><text:bookmark-start text:name="__RefHeading___Toc2196_2018458541 Copia 1"/><text:span text:style-name="T23">ACTIVIDAD </text:span><text:span text:style-name="T24">3</text:span><text:span text:style-name="T23">:</text:span><text:bookmark-end text:name="__RefHeading___Toc2196_2018458541 Copia 1"/></text:h>
      <text:list text:style-name="L5">
        <text:list-item>
          <text:p text:style-name="P28">Codigo:</text:p>
          <text:p text:style-name="P28"/>
          <text:p text:style-name="P29"><text:span text:style-name="T25">import </text:span><text:span text:style-name="T26">java.io.IOException</text:span><text:span text:style-name="T26">;<text:line-break/></text:span><text:span text:style-name="T25">import </text:span><text:span text:style-name="T26">java.util.</text:span><text:span text:style-name="T25">Map</text:span><text:span text:style-name="T26">;<text:line-break/><text:line-break/></text:span><text:span text:style-name="T26">@SuppressWarnings</text:span><text:span text:style-name="T26">(</text:span><text:span text:style-name="T26">"CallToPrintStackTrace"</text:span><text:span text:style-name="T26">)<text:line-break/></text:span><text:span text:style-name="T25">public class </text:span><text:span text:style-name="T26">EjecutarPSP3 </text:span><text:span text:style-name="T26">{<text:line-break/> <text:s text:c="3"/></text:span><text:span text:style-name="T25">public static void </text:span><text:span text:style-name="T26">main</text:span><text:span text:style-name="T26">(</text:span><text:span text:style-name="T26">String</text:span><text:span text:style-name="T26">[] </text:span><text:span text:style-name="T26">args</text:span><text:span text:style-name="T26">) </text:span><text:span text:style-name="T26">{<text:line-break/> <text:s text:c="7"/></text:span><text:span text:style-name="T25">if</text:span><text:span text:style-name="T26">(</text:span><text:span text:style-name="T26">args</text:span><text:span text:style-name="T26">.</text:span><text:span text:style-name="T26">length </text:span><text:span text:style-name="T26">== </text:span><text:span text:style-name="T26">0)</text:span><text:span text:style-name="T26">{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falta comandom para ejecutar"</text:span><text:span text:style-name="T26">.</text:span><text:span text:style-name="T26">toUpperCase</text:span><text:span text:style-name="T26">()</text:span><text:span text:style-name="T26">)</text:span><text:span text:style-name="T26">;<text:line-break/> <text:s text:c="11"/></text:span><text:span text:style-name="T26">System</text:span><text:span text:style-name="T26">.</text:span><text:span text:style-name="T25">exit</text:span><text:span text:style-name="T26">(</text:span><text:span text:style-name="T26">-</text:span><text:span text:style-name="T26">1)</text:span><text:span text:style-name="T26">;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codigo salida: -1"</text:span><text:span text:style-name="T26">.</text:span><text:span text:style-name="T26">toUpperCase</text:span><text:span text:style-name="T26">()</text:span><text:span text:style-name="T26">)</text:span><text:span text:style-name="T26">;<text:line-break/> <text:s text:c="7"/></text:span><text:span text:style-name="T26">}<text:line-break/><text:line-break/> <text:s text:c="7"/></text:span><text:span text:style-name="T26">String </text:span><text:span text:style-name="T26">comando </text:span><text:span text:style-name="T26">= </text:span><text:span text:style-name="T26">args</text:span><text:span text:style-name="T26">[0]</text:span><text:span text:style-name="T26">;<text:line-break/><text:line-break/> <text:s text:c="7"/></text:span><text:span text:style-name="T25">try</text:span><text:span text:style-name="T26">{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EJECUTANDO COMANDO: "</text:span><text:span text:style-name="T26">+</text:span><text:span text:style-name="T26">comando</text:span><text:span text:style-name="T26">)</text:span><text:span text:style-name="T26">;<text:line-break/> <text:s text:c="11"/></text:span><text:span text:style-name="T26">ProcessBuilder </text:span><text:span text:style-name="T26">pb </text:span><text:span text:style-name="T26">= </text:span><text:span text:style-name="T25">new </text:span><text:span text:style-name="T26">ProcessBuilder</text:span><text:span text:style-name="T26">(</text:span><text:span text:style-name="T26">comando</text:span><text:span text:style-name="T26">)</text:span><text:span text:style-name="T26">;<text:line-break/> <text:s text:c="11"/></text:span><text:span text:style-name="T25">int </text:span><text:span text:style-name="T26">codigoSalida </text:span><text:span text:style-name="T26">= </text:span><text:span text:style-name="T26">pb</text:span><text:span text:style-name="T26">.</text:span><text:span text:style-name="T26">start</text:span><text:span text:style-name="T26">()</text:span><text:span text:style-name="T26">.</text:span><text:span text:style-name="T26">waitFor</text:span><text:span text:style-name="T26">()</text:span><text:span text:style-name="T26">;<text:line-break/>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CODIGO SALIDA: "</text:span><text:span text:style-name="T26">+</text:span><text:span text:style-name="T26">codigoSalida</text:span><text:span text:style-name="T26">)</text:span><text:span text:style-name="T26">;<text:line-break/> <text:s text:c="11"/></text:span><text:span text:style-name="T25">Map</text:span><text:span text:style-name="T26">&lt;</text:span><text:span text:style-name="T26">String</text:span><text:span text:style-name="T26">,</text:span><text:span text:style-name="T26">String</text:span><text:span text:style-name="T26">&gt; </text:span><text:span text:style-name="T26">mapa </text:span><text:span text:style-name="T26">= </text:span><text:span text:style-name="T26">pb</text:span><text:span text:style-name="T26">.</text:span><text:span text:style-name="T26">environment</text:span><text:span text:style-name="T26">()</text:span><text:span text:style-name="T26">;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ENTORNO DE EJECUCION: "</text:span><text:span text:style-name="T26">+</text:span><text:span text:style-name="T26">"\nCODIGO SALIDA: "</text:span><text:span text:style-name="T26">+</text:span><text:span text:style-name="T26">codigoSalida</text:span><text:span text:style-name="T26">)</text:span><text:span text:style-name="T26">;<text:line-break/><text:line-break/> <text:s text:c="11"/></text:span><text:span text:style-name="T25">for</text:span><text:span text:style-name="T26">(</text:span><text:span text:style-name="T25">Map</text:span><text:span text:style-name="T26">.</text:span><text:span text:style-name="T25">Entry</text:span><text:span text:style-name="T26">&lt;</text:span><text:span text:style-name="T26">String</text:span><text:span text:style-name="T26">,</text:span><text:span text:style-name="T26">String</text:span><text:span text:style-name="T26">&gt; </text:span><text:span text:style-name="T26">salida </text:span><text:span text:style-name="T26">: </text:span><text:span text:style-name="T26">mapa</text:span><text:span text:style-name="T26">.</text:span><text:span text:style-name="T26">entrySet</text:span><text:span text:style-name="T26">()</text:span><text:span text:style-name="T26">)</text:span><text:span text:style-name="T26">{<text:line-break/> <text:s text:c="15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salida</text:span><text:span text:style-name="T26">.</text:span><text:span text:style-name="T26">getKey</text:span><text:span text:style-name="T26">()</text:span><text:span text:style-name="T26">+</text:span><text:span text:style-name="T26">"-&gt;"</text:span><text:span text:style-name="T26">+</text:span><text:span text:style-name="T26">salida</text:span><text:span text:style-name="T26">.</text:span><text:span text:style-name="T26">getValue</text:span><text:span text:style-name="T26">()</text:span><text:span text:style-name="T26">)</text:span><text:span text:style-name="T26">;<text:line-break/> <text:s text:c="11"/></text:span><text:span text:style-name="T26">}<text:line-break/> <text:s text:c="7"/></text:span><text:span text:style-name="T26">}</text:span><text:span text:style-name="T25">catch </text:span><text:span text:style-name="T26">(</text:span><text:span text:style-name="T26">IOException </text:span><text:span text:style-name="T26">e</text:span><text:span text:style-name="T26">)</text:span><text:span text:style-name="T26">{<text:line-break/>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ERRO AL EJECUTAR EL COMANDO: \n"</text:span><text:span text:style-name="T26">+</text:span><text:span text:style-name="T26">"-"</text:span><text:span text:style-name="T26">.</text:span><text:span text:style-name="T26">repeat</text:span><text:span text:style-name="T26">(</text:span><text:span text:style-name="T26">30</text:span><text:span text:style-name="T26">)</text:span><text:span text:style-name="T26">)</text:span><text:span text:style-name="T26">;<text:line-break/> <text:s text:c="11"/></text:span><text:span text:style-name="T26">e</text:span><text:span text:style-name="T26">.</text:span><text:span text:style-name="T26">printStackTrace</text:span><text:span text:style-name="T26">()</text:span><text:span text:style-name="T26">;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CODIGO SALIDA: -1 \n"</text:span><text:span text:style-name="T26">+</text:span><text:span text:style-name="T26">"-"</text:span><text:span text:style-name="T26">.</text:span><text:span text:style-name="T26">repeat</text:span><text:span text:style-name="T26">(</text:span><text:span text:style-name="T26">30</text:span><text:span text:style-name="T26">)</text:span><text:span text:style-name="T26">)</text:span><text:span text:style-name="T26">;<text:line-break/> <text:s text:c="11"/></text:span><text:span text:style-name="T26">System</text:span><text:span text:style-name="T26">.</text:span><text:span text:style-name="T25">exit</text:span><text:span text:style-name="T26">(</text:span><text:span text:style-name="T26">-</text:span><text:span text:style-name="T26">1)</text:span><text:span text:style-name="T26">;<text:line-break/></text:span><text:soft-page-break/><text:span text:style-name="T26"> <text:s text:c="7"/></text:span><text:span text:style-name="T26">}</text:span><text:span text:style-name="T25">catch </text:span><text:span text:style-name="T26">(</text:span><text:span text:style-name="T26">InterruptedException </text:span><text:span text:style-name="T26">ie</text:span><text:span text:style-name="T26">)</text:span><text:span text:style-name="T26">{<text:line-break/>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EL COMANDO SE INTERUMPIO: "</text:span><text:span text:style-name="T26">+</text:span><text:span text:style-name="T26">"\n-"</text:span><text:span text:style-name="T26">.</text:span><text:span text:style-name="T26">repeat</text:span><text:span text:style-name="T26">(</text:span><text:span text:style-name="T26">30</text:span><text:span text:style-name="T26">)</text:span><text:span text:style-name="T26">)</text:span><text:span text:style-name="T26">;<text:line-break/> <text:s text:c="11"/></text:span><text:span text:style-name="T26">ie</text:span><text:span text:style-name="T26">.</text:span><text:span text:style-name="T26">printStackTrace</text:span><text:span text:style-name="T26">()</text:span><text:span text:style-name="T26">;<text:line-break/> <text:s text:c="11"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CODIGO SALIDA: -2 \n"</text:span><text:span text:style-name="T26">+</text:span><text:span text:style-name="T26">"-"</text:span><text:span text:style-name="T26">.</text:span><text:span text:style-name="T26">repeat</text:span><text:span text:style-name="T26">(</text:span><text:span text:style-name="T26">30</text:span><text:span text:style-name="T26">)</text:span><text:span text:style-name="T26">)</text:span><text:span text:style-name="T26">;<text:line-break/> <text:s text:c="11"/></text:span><text:span text:style-name="T26">System</text:span><text:span text:style-name="T26">.</text:span><text:span text:style-name="T25">exit</text:span><text:span text:style-name="T26">(</text:span><text:span text:style-name="T26">-</text:span><text:span text:style-name="T26">2)</text:span><text:span text:style-name="T26">;<text:line-break/> <text:s text:c="7"/></text:span><text:span text:style-name="T26">}<text:line-break/> <text:s text:c="3"/></text:span><text:span text:style-name="T26">}<text:line-break/></text:span><text:span text:style-name="T26">}</text:span><text:span text:style-name="T10"><text:line-break/></text:span></text:p>
        </text:list-item>
      </text:list>
      <text:list text:style-name="L6">
        <text:list-item>
          <text:p text:style-name="P30">Mostrar el entorno de ejecución de un proceso <draw:frame draw:style-name="fr2" draw:name="Imagen1" text:anchor-type="char" svg:x="0.159cm" svg:y="1.085cm" svg:width="18.366cm" svg:height="10.765cm" draw:z-index="5"><draw:image xlink:href="Pictures/100000010000075D00000451A5F3BFEF.png" xlink:type="simple" xlink:show="embed" xlink:actuate="onLoad" draw:mime-type="image/png"/></draw:frame><draw:frame draw:style-name="fr2" draw:name="Imagen7" text:anchor-type="char" svg:x="0.159cm" svg:y="11.848cm" svg:width="18.366cm" svg:height="3.845cm" draw:z-index="6"><draw:image xlink:href="Pictures/10000001000007690000018DC6619D2F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 style:font-name="Agency FB1" fo:font-family="'Agency FB'" style:font-family-generic="swiss" style:font-pitch="variable" fo:font-size="16pt" fo:font-weight="normal" style:font-size-asian="12pt" style:font-weight-asian="normal" style:font-size-complex="13.699999809265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92130" officeooo:paragraph-rsid="00192130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PSP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1:47:03.582425200</meta:creation-date>
    <meta:editing-duration>PT1H34M49S</meta:editing-duration>
    <meta:editing-cycles>6</meta:editing-cycles>
    <meta:generator>LibreOffice/25.2.5.2$Windows_X86_64 LibreOffice_project/03d19516eb2e1dd5d4ccd751a0d6f35f35e08022</meta:generator>
    <dc:title>Tareas</dc:title>
    <dc:date>2025-10-23T23:58:25.697025900</dc:date>
    <meta:document-statistic meta:table-count="0" meta:image-count="7" meta:object-count="0" meta:page-count="6" meta:paragraph-count="27" meta:word-count="359" meta:character-count="4636" meta:non-whitespace-character-count="3392"/>
    <meta:template xlink:type="simple" xlink:actuate="onRequest" xlink:title="Tareas" xlink:href="../../../../AppData/Roaming/LibreOffice/4/user/template/Tareas.ott" meta:date="2025-10-17T11:47:03.169556800"/>
  </office:meta>
</office:document-meta>
</file>